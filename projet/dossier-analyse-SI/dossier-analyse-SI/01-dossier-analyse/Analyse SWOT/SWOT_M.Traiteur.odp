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Century Gothic" svg:font-family="'Century Goth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svg:stroke-linecap="butt" draw:fill="solid" draw:fill-color="#f5b5a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 style:family="graphic" style:parent-style-name="standard">
      <style:graphic-properties draw:stroke="none" svg:stroke-width="0.035cm" draw:stroke-linejoin="miter" svg:stroke-linecap="butt" draw:fill="solid" draw:fill-color="#d6eed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 style:family="graphic" style:parent-style-name="standard">
      <style:graphic-properties draw:stroke="none" svg:stroke-width="0.035cm" draw:stroke-linejoin="miter" svg:stroke-linecap="butt" draw:fill="solid" draw:fill-color="#fbcb8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 style:family="graphic" style:parent-style-name="standard">
      <style:graphic-properties draw:stroke="none" svg:stroke-width="0.035cm" draw:stroke-linejoin="miter" svg:stroke-linecap="butt" draw:fill="solid" draw:fill-color="#ffd96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loext:transformation loext:type="lummod" loext:value="6000"/>
          <loext:transformation loext:type="lumoff" loext:value="4000"/>
        </loext:fill-complex-color>
      </style:graphic-properties>
    </style:style>
    <style:style style:name="gr5" style:family="graphic" style:parent-style-name="standard">
      <style:graphic-properties draw:stroke="none" svg:stroke-width="0.026cm" draw:stroke-linejoin="miter" svg:stroke-linecap="butt" draw:fill="solid" draw:fill-color="#ffe58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 style:family="graphic" style:parent-style-name="standard">
      <style:graphic-properties draw:stroke="none" svg:stroke-width="0.026cm" draw:stroke-linejoin="miter" svg:stroke-linecap="butt" draw:fill="solid" draw:fill-color="#fbdb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graphic-properties draw:stroke="none" svg:stroke-width="0.026cm" draw:stroke-linejoin="miter" svg:stroke-linecap="butt" draw:fill="solid" draw:fill-color="#dff8d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graphic-properties draw:stroke="none" svg:stroke-width="0.026cm" draw:stroke-linejoin="miter" svg:stroke-linecap="butt" draw:fill="solid" draw:fill-color="#f8c6b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graphic-properties style:protect="size" loext:decorative="false"/>
    </style:style>
    <style:style style:name="pr1" style:family="presentation" style:parent-style-name="Пустой_20_слайд-notes">
      <style:graphic-properties draw:fill-color="#ffffff" fo:min-height="13.364cm" loext:decorative="false"/>
      <style:paragraph-properties style:writing-mode="lr-tb"/>
    </style:style>
    <style:style style:name="P1" style:family="paragraph">
      <loext:graphic-properties draw:fill="solid" draw:fill-color="#f5b5a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 style:family="paragraph">
      <loext:graphic-properties draw:fill="solid" draw:fill-color="#d6eed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 style:family="paragraph">
      <loext:graphic-properties draw:fill="solid" draw:fill-color="#fbcb8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4" style:family="paragraph">
      <loext:graphic-properties draw:fill="solid" draw:fill-color="#ffd96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5" style:family="paragraph">
      <loext:graphic-properties draw:fill="solid" draw:fill-color="#ffe58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 style:family="paragraph">
      <loext:graphic-properties draw:fill="solid" draw:fill-color="#fbdb9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 style:family="paragraph">
      <loext:graphic-properties draw:fill="solid" draw:fill-color="#dff8d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 style:family="paragraph">
      <loext:graphic-properties draw:fill="solid" draw:fill-color="#f8c6b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9" style:family="paragraph">
      <style:paragraph-properties fo:margin-left="0cm" fo:margin-right="0cm" fo:margin-top="0.32cm" fo:margin-bottom="0.25cm" fo:line-height="100%" fo:text-align="start" fo:text-indent="0cm" style:punctuation-wrap="hanging" loext:tab-stop-distance="2.54cm" style:writing-mode="lr-tb">
        <style:tab-stops/>
      </style:paragraph-properties>
      <style:text-properties fo:font-size="9pt" fo:font-weight="bold" style:font-size-asian="9pt" style:font-weight-asian="bold" style:font-size-complex="9pt" style:font-weight-complex="bold" fo:hyphenate="false"/>
    </style:style>
    <style:style style:name="P10" style:family="paragraph">
      <loext:graphic-properties draw:fill="none"/>
      <style:paragraph-properties fo:margin-left="0cm" fo:margin-right="0cm" fo:margin-top="0cm" fo:margin-bottom="0.423cm" fo:line-height="100%" fo:text-align="start" fo:text-indent="0cm" style:punctuation-wrap="hanging" loext:tab-stop-distance="2.54cm" style:writing-mode="lr-tb" style:font-independent-line-spacing="true">
        <style:tab-stops/>
      </style:paragraph-properties>
      <style:text-properties fo:font-size="9pt" fo:font-weight="bold" style:font-size-asian="9pt" style:font-weight-asian="bold" style:font-size-complex="9pt" style:font-weight-complex="bold" fo:hyphenate="false"/>
    </style:style>
    <style:style style:name="P11" style:family="paragraph">
      <style:paragraph-properties fo:margin-left="0cm" fo:margin-right="0cm" fo:margin-top="0.32cm" fo:margin-bottom="0.25cm" fo:line-height="100%" fo:text-align="start" fo:text-indent="0cm" style:punctuation-wrap="hanging" loext:tab-stop-distance="2.54cm" style:writing-mode="lr-tb">
        <style:tab-stops/>
      </style:paragraph-properties>
      <style:text-properties fo:font-size="9pt" style:font-size-asian="9pt" style:font-size-complex="9pt" fo:hyphenate="false"/>
    </style:style>
    <style:style style:name="P12" style:family="paragraph">
      <loext:graphic-properties draw:fill="none"/>
      <style:paragraph-properties fo:margin-left="0cm" fo:margin-right="0cm" fo:margin-top="0cm" fo:margin-bottom="0.423cm" fo:line-height="100%" fo:text-align="start" fo:text-indent="0cm" style:punctuation-wrap="hanging" loext:tab-stop-distance="2.54cm" style:writing-mode="lr-tb" style:font-independent-line-spacing="true">
        <style:tab-stops/>
      </style:paragraph-properties>
      <style:text-properties fo:font-size="9pt" style:font-size-asian="9pt" style:font-size-complex="9pt" fo:hyphenate="false"/>
    </style:style>
    <style:style style:name="P1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14"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5" style:family="paragraph">
      <loext:graphic-properties draw:fill-color="#ffffff"/>
    </style:style>
    <style:style style:name="T1" style:family="text">
      <style:text-properties fo:font-variant="normal" fo:text-transform="none" fo:color="#000000" loext:opacity="100%" style:text-outline="false" style:text-line-through-style="none" style:text-line-through-type="none" style:text-position="0% 100%" style:font-name="Century Gothic" fo:font-size="9pt" fo:letter-spacing="normal" fo:language="fr" fo:country="FR" fo:font-style="normal" fo:text-shadow="none" style:text-underline-style="none" fo:font-weight="normal" style:letter-kerning="true" fo:background-color="transparent" style:font-name-asian="Arial" style:font-size-asian="9pt" style:font-style-asian="normal" style:font-weight-asian="normal" style:font-name-complex="Arial" style:font-size-complex="9pt" style:font-style-complex="normal" style:font-weight-complex="normal" style:text-emphasize="none" style:font-relief="none" style:text-overline-style="none" style:text-overline-color="font-color">
        <loext:char-complex-color loext:theme-type="dark1" loext:color-type="theme"/>
      </style:text-properties>
    </style:style>
    <style:style style:name="T2" style:family="text">
      <style:text-properties fo:font-variant="normal" fo:text-transform="none" fo:color="#808080" loext:opacity="100%" style:text-outline="false" style:text-line-through-style="none" style:text-line-through-type="none" style:text-position="0% 100%" style:font-name="Century Gothic" fo:font-size="14pt" fo:letter-spacing="0.106cm"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5000"/>
          <loext:transformation loext:type="lumoff" loext:value="5000"/>
        </loext:char-complex-color>
      </style:text-properties>
    </style:style>
    <style:style style:name="T3" style:family="text">
      <style:text-properties fo:font-variant="normal" fo:text-transform="none" fo:color="#3465a4" loext:opacity="100%" style:text-outline="false" style:text-line-through-style="none" style:text-line-through-type="none" style:text-position="0% 100%" style:font-name="Century Gothic" fo:font-size="14pt" fo:letter-spacing="0.106cm"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4" style:family="text">
      <style:text-properties fo:font-variant="normal" fo:text-transform="none" fo:color="#ff4000" loext:opacity="100%" style:text-outline="false" style:text-line-through-style="none" style:text-line-through-type="none" style:text-position="0% 100%" style:font-name="Century Gothic" fo:font-size="14pt" fo:letter-spacing="0.106cm"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Century Gothic" fo:font-size="18pt" fo:letter-spacing="0.106cm"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o">
        <style:list-level-properties text:min-label-width="0.794cm"/>
        <style:text-properties fo:font-family="'Courier New'" style:font-family-generic="modern" style:font-pitch="fixed" fo:color="#000000" fo:font-size="11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Пустой_20_слайд" presentation:presentation-page-layout-name="AL1T0">
        <draw:custom-shape draw:name="Round Single Corner Rectangle 2" draw:style-name="gr1" draw:text-style-name="P1" draw:layer="layout" svg:width="15.56cm" svg:height="8.082cm" svg:x="17.574cm" svg:y="10.269cm">
          <text:p/>
          <draw:enhanced-geometry draw:mirror-horizontal="false" draw:mirror-vertical="true" svg:viewBox="0 0 0 0" draw:text-areas="0 0 ?f5 ?f8" draw:type="ooxml-round1Rect" draw:modifiers="4160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inimum="0" draw:handle-range-x-maximum="50000"/>
          </draw:enhanced-geometry>
        </draw:custom-shape>
        <draw:custom-shape draw:name="Round Single Corner Rectangle 8" draw:style-name="gr2" draw:text-style-name="P2" draw:layer="layout" svg:width="15.56cm" svg:height="8.082cm" svg:x="2.013cm" svg:y="10.269cm">
          <text:p/>
          <draw:enhanced-geometry draw:mirror-horizontal="true" draw:mirror-vertical="true" svg:viewBox="0 0 0 0" draw:text-areas="0 0 ?f5 ?f8" draw:type="ooxml-round1Rect" draw:modifiers="4160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inimum="0" draw:handle-range-x-maximum="50000"/>
          </draw:enhanced-geometry>
        </draw:custom-shape>
        <draw:custom-shape draw:name="Round Single Corner Rectangle 1" draw:style-name="gr3" draw:text-style-name="P3" draw:layer="layout" svg:width="15.56cm" svg:height="8.082cm" svg:x="17.574cm" svg:y="2.2cm">
          <text:p/>
          <draw:enhanced-geometry draw:mirror-horizontal="false" draw:mirror-vertical="false" svg:viewBox="0 0 0 0" draw:text-areas="0 0 ?f5 ?f8" draw:type="ooxml-round1Rect" draw:modifiers="4160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inimum="0" draw:handle-range-x-maximum="50000"/>
          </draw:enhanced-geometry>
        </draw:custom-shape>
        <draw:custom-shape draw:name="Round Single Corner Rectangle 4" draw:style-name="gr4" draw:text-style-name="P4" draw:layer="layout" svg:width="15.56cm" svg:height="8.082cm" svg:x="2.013cm" svg:y="2.2cm">
          <text:p/>
          <draw:enhanced-geometry draw:mirror-horizontal="true" draw:mirror-vertical="false" svg:viewBox="0 0 0 0" draw:text-areas="0 0 ?f5 ?f8" draw:type="ooxml-round1Rect" draw:modifiers="4160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inimum="0" draw:handle-range-x-maximum="50000"/>
          </draw:enhanced-geometry>
        </draw:custom-shape>
        <draw:custom-shape draw:name="Freeform 11" draw:style-name="gr5" draw:text-style-name="P5" draw:layer="layout" svg:width="15.228cm" svg:height="8.427cm" svg:x="2.345cm" svg:y="1.8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drawooo:sub-view-size="3031136 1537904" draw:text-areas="0 0 ?f130 ?f131" draw:type="ooxml-non-primitive" draw:enhanced-path="M 2823342 1191912 C 2684020 1078704 2540133 1054656 2540133 1054656 2540133 1054656 2866233 1110357 2973506 677296 3055863 312103 2632951 38922 2171238 68388 1627834 102987 1548425 120857 879869 8315 879869 8315 371557 -41493 141889 102702 125722 112873 -6943 201747 285 227031 7512 252410 107368 290146 176221 312769 315162 358489 266946 559431 425098 651537 509643 700774 577069 699919 648204 754479 742259 826529 803979 945535 819861 1003232 819861 1003232 850388 1105414 1103070 1324891 1302305 1497887 1549091 1541706 2094112 1509293 2163250 1505206 2361725 1462432 2424491 1393519 2517880 1290862 2510271 1119102 2510271 1119102 2510271 1119102 2821916 1226321 2821916 1537904 L 3031137 1537904 C 3031137 1537904 2958480 1301698 2823532 1192007 Z M 2429436 987453 C 2430577 988404 2431814 989450 2432955 990400 2431814 989545 2430672 988784 2429531 987929 2429531 988119 2429531 988404 2429531 988594 2429817 990780 2430197 994202 2430672 998575 2433620 1028897 2438090 1105414 2414220 1156267 2354687 1283353 2217742 1284874 2197106 1284779 2380935 1274798 2438661 1094768 2430672 998575 2430387 995153 2430007 991826 2429531 988594 2429531 988404 2429531 988119 2429531 987929 2391967 960554 2353070 932893 2312843 905043 2082795 1162446 1596831 1187920 1484328 1204459 1908095 1124234 2148795 1005894 2274232 878618 2177039 812746 2071668 746400 1956406 682334 1766205 914453 1315905 941638 1232311 955896 1611382 883941 1816989 774250 1910948 657525 1787698 591273 1653321 527968 1505725 470747 1396169 634237 1028701 656860 961275 665510 1279291 617698 1429360 540135 1479668 460766 1350616 411814 1211675 367709 1061416 330258 999505 405445 772596 436527 733985 441565 915532 413715 1000837 368565 1029082 322369 791426 265337 526095 225225 227765 210017 445545 210017 701365 199751 1040018 278740 1036975 244331 1008159 212203 970595 189675 964889 186253 958992 183022 952906 180075 952906 180075 959944 183592 970595 189675 1003214 208211 1069975 250319 1076442 287390 1203781 318947 1342913 363432 1495645 425406 1518944 341855 1442674 260680 1346147 214389 1346147 214389 1548996 264862 1535682 389571 1533875 406396 1529786 422079 1523889 436813 1585800 462572 1649993 491183 1716563 523026 1791502 558860 1861971 596216 1928352 634237 2044660 462192 1930254 279405 1778188 182546 1778188 182546 2072144 303168 2035245 512380 2025259 568841 2003481 617793 1973239 660472 2090593 730146 2193777 801435 2283267 869493 2488779 650586 2360108 406966 2236287 284253 2236287 284253 2474894 436527 2424015 685471 2406802 769402 2369713 839171 2319595 897534 2359157 928521 2395961 958748 2429626 987549 2429626 986978 2429436 986313 2429341 985648 2538326 980895 2739939 885177 2772654 643648 2781593 668646 2779881 825198 2636470 935935 2573799 984317 2429341 985552 2429341 985552 2429341 985552 2429436 986218 2429626 987453 Z N">
            <draw:equation draw:name="f0" draw:formula="2823342*logwidth/3031136"/>
            <draw:equation draw:name="f1" draw:formula="1191912*logheight/1537904"/>
            <draw:equation draw:name="f2" draw:formula="2540133*logwidth/3031136"/>
            <draw:equation draw:name="f3" draw:formula="1054656*logheight/1537904"/>
            <draw:equation draw:name="f4" draw:formula="2973506*logwidth/3031136"/>
            <draw:equation draw:name="f5" draw:formula="677296*logheight/1537904"/>
            <draw:equation draw:name="f6" draw:formula="2171238*logwidth/3031136"/>
            <draw:equation draw:name="f7" draw:formula="68388*logheight/1537904"/>
            <draw:equation draw:name="f8" draw:formula="879869*logwidth/3031136"/>
            <draw:equation draw:name="f9" draw:formula="8315*logheight/1537904"/>
            <draw:equation draw:name="f10" draw:formula="141889*logwidth/3031136"/>
            <draw:equation draw:name="f11" draw:formula="102702*logheight/1537904"/>
            <draw:equation draw:name="f12" draw:formula="285*logwidth/3031136"/>
            <draw:equation draw:name="f13" draw:formula="227031*logheight/1537904"/>
            <draw:equation draw:name="f14" draw:formula="176221*logwidth/3031136"/>
            <draw:equation draw:name="f15" draw:formula="312769*logheight/1537904"/>
            <draw:equation draw:name="f16" draw:formula="425098*logwidth/3031136"/>
            <draw:equation draw:name="f17" draw:formula="651537*logheight/1537904"/>
            <draw:equation draw:name="f18" draw:formula="648204*logwidth/3031136"/>
            <draw:equation draw:name="f19" draw:formula="754479*logheight/1537904"/>
            <draw:equation draw:name="f20" draw:formula="819861*logwidth/3031136"/>
            <draw:equation draw:name="f21" draw:formula="1003232*logheight/1537904"/>
            <draw:equation draw:name="f22" draw:formula="1103070*logwidth/3031136"/>
            <draw:equation draw:name="f23" draw:formula="1324891*logheight/1537904"/>
            <draw:equation draw:name="f24" draw:formula="2094112*logwidth/3031136"/>
            <draw:equation draw:name="f25" draw:formula="1509293*logheight/1537904"/>
            <draw:equation draw:name="f26" draw:formula="2424491*logwidth/3031136"/>
            <draw:equation draw:name="f27" draw:formula="1393519*logheight/1537904"/>
            <draw:equation draw:name="f28" draw:formula="2510271*logwidth/3031136"/>
            <draw:equation draw:name="f29" draw:formula="1119102*logheight/1537904"/>
            <draw:equation draw:name="f30" draw:formula="2821916*logwidth/3031136"/>
            <draw:equation draw:name="f31" draw:formula="1537904*logheight/1537904"/>
            <draw:equation draw:name="f32" draw:formula="3031137*logwidth/3031136"/>
            <draw:equation draw:name="f33" draw:formula="1537904*logheight/1537904"/>
            <draw:equation draw:name="f34" draw:formula="2823532*logwidth/3031136"/>
            <draw:equation draw:name="f35" draw:formula="1192007*logheight/1537904"/>
            <draw:equation draw:name="f36" draw:formula="2429436*logwidth/3031136"/>
            <draw:equation draw:name="f37" draw:formula="987453*logheight/1537904"/>
            <draw:equation draw:name="f38" draw:formula="2432955*logwidth/3031136"/>
            <draw:equation draw:name="f39" draw:formula="990400*logheight/1537904"/>
            <draw:equation draw:name="f40" draw:formula="2429531*logwidth/3031136"/>
            <draw:equation draw:name="f41" draw:formula="987929*logheight/1537904"/>
            <draw:equation draw:name="f42" draw:formula="2429531*logwidth/3031136"/>
            <draw:equation draw:name="f43" draw:formula="988594*logheight/1537904"/>
            <draw:equation draw:name="f44" draw:formula="2430672*logwidth/3031136"/>
            <draw:equation draw:name="f45" draw:formula="998575*logheight/1537904"/>
            <draw:equation draw:name="f46" draw:formula="2414220*logwidth/3031136"/>
            <draw:equation draw:name="f47" draw:formula="1156267*logheight/1537904"/>
            <draw:equation draw:name="f48" draw:formula="2197106*logwidth/3031136"/>
            <draw:equation draw:name="f49" draw:formula="1284779*logheight/1537904"/>
            <draw:equation draw:name="f50" draw:formula="2430672*logwidth/3031136"/>
            <draw:equation draw:name="f51" draw:formula="998575*logheight/1537904"/>
            <draw:equation draw:name="f52" draw:formula="2429531*logwidth/3031136"/>
            <draw:equation draw:name="f53" draw:formula="988594*logheight/1537904"/>
            <draw:equation draw:name="f54" draw:formula="2429531*logwidth/3031136"/>
            <draw:equation draw:name="f55" draw:formula="987929*logheight/1537904"/>
            <draw:equation draw:name="f56" draw:formula="2312843*logwidth/3031136"/>
            <draw:equation draw:name="f57" draw:formula="905043*logheight/1537904"/>
            <draw:equation draw:name="f58" draw:formula="1484328*logwidth/3031136"/>
            <draw:equation draw:name="f59" draw:formula="1204459*logheight/1537904"/>
            <draw:equation draw:name="f60" draw:formula="2274232*logwidth/3031136"/>
            <draw:equation draw:name="f61" draw:formula="878618*logheight/1537904"/>
            <draw:equation draw:name="f62" draw:formula="1956406*logwidth/3031136"/>
            <draw:equation draw:name="f63" draw:formula="682334*logheight/1537904"/>
            <draw:equation draw:name="f64" draw:formula="1232311*logwidth/3031136"/>
            <draw:equation draw:name="f65" draw:formula="955896*logheight/1537904"/>
            <draw:equation draw:name="f66" draw:formula="1910948*logwidth/3031136"/>
            <draw:equation draw:name="f67" draw:formula="657525*logheight/1537904"/>
            <draw:equation draw:name="f68" draw:formula="1505725*logwidth/3031136"/>
            <draw:equation draw:name="f69" draw:formula="470747*logheight/1537904"/>
            <draw:equation draw:name="f70" draw:formula="961275*logwidth/3031136"/>
            <draw:equation draw:name="f71" draw:formula="665510*logheight/1537904"/>
            <draw:equation draw:name="f72" draw:formula="1479668*logwidth/3031136"/>
            <draw:equation draw:name="f73" draw:formula="460766*logheight/1537904"/>
            <draw:equation draw:name="f74" draw:formula="1061416*logwidth/3031136"/>
            <draw:equation draw:name="f75" draw:formula="330258*logheight/1537904"/>
            <draw:equation draw:name="f76" draw:formula="733985*logwidth/3031136"/>
            <draw:equation draw:name="f77" draw:formula="441565*logheight/1537904"/>
            <draw:equation draw:name="f78" draw:formula="1029082*logwidth/3031136"/>
            <draw:equation draw:name="f79" draw:formula="322369*logheight/1537904"/>
            <draw:equation draw:name="f80" draw:formula="227765*logwidth/3031136"/>
            <draw:equation draw:name="f81" draw:formula="210017*logheight/1537904"/>
            <draw:equation draw:name="f82" draw:formula="1040018*logwidth/3031136"/>
            <draw:equation draw:name="f83" draw:formula="278740*logheight/1537904"/>
            <draw:equation draw:name="f84" draw:formula="970595*logwidth/3031136"/>
            <draw:equation draw:name="f85" draw:formula="189675*logheight/1537904"/>
            <draw:equation draw:name="f86" draw:formula="952906*logwidth/3031136"/>
            <draw:equation draw:name="f87" draw:formula="180075*logheight/1537904"/>
            <draw:equation draw:name="f88" draw:formula="970595*logwidth/3031136"/>
            <draw:equation draw:name="f89" draw:formula="189675*logheight/1537904"/>
            <draw:equation draw:name="f90" draw:formula="1076442*logwidth/3031136"/>
            <draw:equation draw:name="f91" draw:formula="287390*logheight/1537904"/>
            <draw:equation draw:name="f92" draw:formula="1495645*logwidth/3031136"/>
            <draw:equation draw:name="f93" draw:formula="425406*logheight/1537904"/>
            <draw:equation draw:name="f94" draw:formula="1346147*logwidth/3031136"/>
            <draw:equation draw:name="f95" draw:formula="214389*logheight/1537904"/>
            <draw:equation draw:name="f96" draw:formula="1535682*logwidth/3031136"/>
            <draw:equation draw:name="f97" draw:formula="389571*logheight/1537904"/>
            <draw:equation draw:name="f98" draw:formula="1523889*logwidth/3031136"/>
            <draw:equation draw:name="f99" draw:formula="436813*logheight/1537904"/>
            <draw:equation draw:name="f100" draw:formula="1716563*logwidth/3031136"/>
            <draw:equation draw:name="f101" draw:formula="523026*logheight/1537904"/>
            <draw:equation draw:name="f102" draw:formula="1928352*logwidth/3031136"/>
            <draw:equation draw:name="f103" draw:formula="634237*logheight/1537904"/>
            <draw:equation draw:name="f104" draw:formula="1778188*logwidth/3031136"/>
            <draw:equation draw:name="f105" draw:formula="182546*logheight/1537904"/>
            <draw:equation draw:name="f106" draw:formula="2035245*logwidth/3031136"/>
            <draw:equation draw:name="f107" draw:formula="512380*logheight/1537904"/>
            <draw:equation draw:name="f108" draw:formula="1973239*logwidth/3031136"/>
            <draw:equation draw:name="f109" draw:formula="660472*logheight/1537904"/>
            <draw:equation draw:name="f110" draw:formula="2283267*logwidth/3031136"/>
            <draw:equation draw:name="f111" draw:formula="869493*logheight/1537904"/>
            <draw:equation draw:name="f112" draw:formula="2236287*logwidth/3031136"/>
            <draw:equation draw:name="f113" draw:formula="284253*logheight/1537904"/>
            <draw:equation draw:name="f114" draw:formula="2424015*logwidth/3031136"/>
            <draw:equation draw:name="f115" draw:formula="685471*logheight/1537904"/>
            <draw:equation draw:name="f116" draw:formula="2319595*logwidth/3031136"/>
            <draw:equation draw:name="f117" draw:formula="897534*logheight/1537904"/>
            <draw:equation draw:name="f118" draw:formula="2429626*logwidth/3031136"/>
            <draw:equation draw:name="f119" draw:formula="987549*logheight/1537904"/>
            <draw:equation draw:name="f120" draw:formula="2429341*logwidth/3031136"/>
            <draw:equation draw:name="f121" draw:formula="985648*logheight/1537904"/>
            <draw:equation draw:name="f122" draw:formula="2772654*logwidth/3031136"/>
            <draw:equation draw:name="f123" draw:formula="643648*logheight/1537904"/>
            <draw:equation draw:name="f124" draw:formula="2636470*logwidth/3031136"/>
            <draw:equation draw:name="f125" draw:formula="935935*logheight/1537904"/>
            <draw:equation draw:name="f126" draw:formula="2429341*logwidth/3031136"/>
            <draw:equation draw:name="f127" draw:formula="985552*logheight/1537904"/>
            <draw:equation draw:name="f128" draw:formula="2429626*logwidth/3031136"/>
            <draw:equation draw:name="f129" draw:formula="987453*logheight/1537904"/>
            <draw:equation draw:name="f130" draw:formula="logwidth"/>
            <draw:equation draw:name="f131" draw:formula="logheight"/>
          </draw:enhanced-geometry>
        </draw:custom-shape>
        <draw:custom-shape draw:name="Freeform 12" draw:style-name="gr6" draw:text-style-name="P6" draw:layer="layout" svg:width="15.228cm" svg:height="8.427cm" svg:x="17.589cm" svg:y="1.8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drawooo:sub-view-size="3031136 1537876" draw:text-areas="0 0 ?f130 ?f131" draw:type="ooxml-non-primitive" draw:enhanced-path="M 0 1537876 L 209221 1537876 C 209221 1226293 520865 1119074 520865 1119074 520865 1119074 513257 1290929 606646 1393491 669317 1462404 867887 1505178 937025 1509265 1482046 1541678 1728832 1497859 1928067 1324863 2180749 1105481 2211276 1003204 2211276 1003204 2227158 945507 2288878 826596 2382932 754451 2454068 699986 2521494 700746 2606038 651509 2764190 559403 2715974 358461 2854916 312741 2923769 290023 3023624 252287 3030852 227003 3038080 201719 2905414 112750 2889248 102674 2659580 -41426 2151268 8287 2151268 8287 1482616 120734 1403303 102959 859899 68360 398186 38989 -24726 312075 57631 677268 164904 1110424 491004 1054628 491004 1054628 491004 1054628 347117 1078581 207795 1191884 72847 1301575 190 1537781 190 1537781 Z M 601796 985619 C 601796 985619 457433 984384 394667 936002 251160 825265 249544 668713 258483 643714 291198 885149 492906 980962 601796 985714 601701 986285 601606 986950 601511 987615 635271 958814 671980 928588 711542 897600 661424 839333 624335 769469 607121 685538 556148 436594 794850 284320 794850 284320 670934 407128 542358 650653 747870 869560 837360 801502 940639 730212 1057898 660539 1027656 617860 1005878 568908 995892 512447 958898 303235 1252949 182613 1252949 182613 1100883 279567 986477 462259 1102785 634304 1169165 596283 1239635 558927 1314574 523092 1381144 491250 1445337 462639 1507247 436880 1501256 422146 1497167 406368 1495455 389638 1482141 264834 1684990 214456 1684990 214456 1588463 260747 1512193 341922 1535492 425473 1688224 363499 1827356 319014 1954695 287457 1961257 250291 2028017 208278 2060542 189742 2071193 183659 2078231 180142 2078231 180142 2072144 183089 2066248 186320 2060542 189742 2022977 212270 1994067 244398 1991119 278807 2329772 199913 2585591 210084 2803372 210084 2505042 225292 2239711 265404 2002055 322436 2030300 368632 2115605 413782 2297152 441632 2258541 436594 2031726 405417 1969721 330325 1819462 367776 1680520 411976 1551469 460833 1601682 540202 1751846 617765 2069862 665577 2002436 656927 1634967 634304 1525412 470813 1377911 528035 1243439 591340 1120189 657592 1214148 774317 1419755 884103 1798825 955963 1715232 941800 1264836 914520 1074731 682401 959469 746467 854097 812813 756905 878685 882342 1006056 1123041 1124301 1546809 1204526 1434305 1187987 948247 1162418 718294 905110 677971 932960 639170 960621 601606 987996 601606 988186 601606 988471 601606 988661 601130 991893 600750 995220 600464 998642 592571 1094835 650202 1274865 834031 1284846 813299 1285036 676450 1283420 616917 1156334 593142 1105481 597516 1028868 600464 998642 600845 994269 601320 990847 601606 988661 601606 988376 601606 988186 601606 987996 600464 988851 599323 989707 598182 990467 599323 989517 600559 988471 601701 987520 601891 986380 601986 985619 601986 985619 Z N">
            <draw:equation draw:name="f0" draw:formula="0*logwidth/3031136"/>
            <draw:equation draw:name="f1" draw:formula="1537876*logheight/1537876"/>
            <draw:equation draw:name="f2" draw:formula="209221*logwidth/3031136"/>
            <draw:equation draw:name="f3" draw:formula="1537876*logheight/1537876"/>
            <draw:equation draw:name="f4" draw:formula="520865*logwidth/3031136"/>
            <draw:equation draw:name="f5" draw:formula="1119074*logheight/1537876"/>
            <draw:equation draw:name="f6" draw:formula="606646*logwidth/3031136"/>
            <draw:equation draw:name="f7" draw:formula="1393491*logheight/1537876"/>
            <draw:equation draw:name="f8" draw:formula="937025*logwidth/3031136"/>
            <draw:equation draw:name="f9" draw:formula="1509265*logheight/1537876"/>
            <draw:equation draw:name="f10" draw:formula="1928067*logwidth/3031136"/>
            <draw:equation draw:name="f11" draw:formula="1324863*logheight/1537876"/>
            <draw:equation draw:name="f12" draw:formula="2211276*logwidth/3031136"/>
            <draw:equation draw:name="f13" draw:formula="1003204*logheight/1537876"/>
            <draw:equation draw:name="f14" draw:formula="2382932*logwidth/3031136"/>
            <draw:equation draw:name="f15" draw:formula="754451*logheight/1537876"/>
            <draw:equation draw:name="f16" draw:formula="2606038*logwidth/3031136"/>
            <draw:equation draw:name="f17" draw:formula="651509*logheight/1537876"/>
            <draw:equation draw:name="f18" draw:formula="2854916*logwidth/3031136"/>
            <draw:equation draw:name="f19" draw:formula="312741*logheight/1537876"/>
            <draw:equation draw:name="f20" draw:formula="3030852*logwidth/3031136"/>
            <draw:equation draw:name="f21" draw:formula="227003*logheight/1537876"/>
            <draw:equation draw:name="f22" draw:formula="2889248*logwidth/3031136"/>
            <draw:equation draw:name="f23" draw:formula="102674*logheight/1537876"/>
            <draw:equation draw:name="f24" draw:formula="2151268*logwidth/3031136"/>
            <draw:equation draw:name="f25" draw:formula="8287*logheight/1537876"/>
            <draw:equation draw:name="f26" draw:formula="859899*logwidth/3031136"/>
            <draw:equation draw:name="f27" draw:formula="68360*logheight/1537876"/>
            <draw:equation draw:name="f28" draw:formula="57631*logwidth/3031136"/>
            <draw:equation draw:name="f29" draw:formula="677268*logheight/1537876"/>
            <draw:equation draw:name="f30" draw:formula="491004*logwidth/3031136"/>
            <draw:equation draw:name="f31" draw:formula="1054628*logheight/1537876"/>
            <draw:equation draw:name="f32" draw:formula="207795*logwidth/3031136"/>
            <draw:equation draw:name="f33" draw:formula="1191884*logheight/1537876"/>
            <draw:equation draw:name="f34" draw:formula="190*logwidth/3031136"/>
            <draw:equation draw:name="f35" draw:formula="1537781*logheight/1537876"/>
            <draw:equation draw:name="f36" draw:formula="601796*logwidth/3031136"/>
            <draw:equation draw:name="f37" draw:formula="985619*logheight/1537876"/>
            <draw:equation draw:name="f38" draw:formula="394667*logwidth/3031136"/>
            <draw:equation draw:name="f39" draw:formula="936002*logheight/1537876"/>
            <draw:equation draw:name="f40" draw:formula="258483*logwidth/3031136"/>
            <draw:equation draw:name="f41" draw:formula="643714*logheight/1537876"/>
            <draw:equation draw:name="f42" draw:formula="601796*logwidth/3031136"/>
            <draw:equation draw:name="f43" draw:formula="985714*logheight/1537876"/>
            <draw:equation draw:name="f44" draw:formula="601511*logwidth/3031136"/>
            <draw:equation draw:name="f45" draw:formula="987615*logheight/1537876"/>
            <draw:equation draw:name="f46" draw:formula="711542*logwidth/3031136"/>
            <draw:equation draw:name="f47" draw:formula="897600*logheight/1537876"/>
            <draw:equation draw:name="f48" draw:formula="607121*logwidth/3031136"/>
            <draw:equation draw:name="f49" draw:formula="685538*logheight/1537876"/>
            <draw:equation draw:name="f50" draw:formula="794850*logwidth/3031136"/>
            <draw:equation draw:name="f51" draw:formula="284320*logheight/1537876"/>
            <draw:equation draw:name="f52" draw:formula="747870*logwidth/3031136"/>
            <draw:equation draw:name="f53" draw:formula="869560*logheight/1537876"/>
            <draw:equation draw:name="f54" draw:formula="1057898*logwidth/3031136"/>
            <draw:equation draw:name="f55" draw:formula="660539*logheight/1537876"/>
            <draw:equation draw:name="f56" draw:formula="995892*logwidth/3031136"/>
            <draw:equation draw:name="f57" draw:formula="512447*logheight/1537876"/>
            <draw:equation draw:name="f58" draw:formula="1252949*logwidth/3031136"/>
            <draw:equation draw:name="f59" draw:formula="182613*logheight/1537876"/>
            <draw:equation draw:name="f60" draw:formula="1102785*logwidth/3031136"/>
            <draw:equation draw:name="f61" draw:formula="634304*logheight/1537876"/>
            <draw:equation draw:name="f62" draw:formula="1314574*logwidth/3031136"/>
            <draw:equation draw:name="f63" draw:formula="523092*logheight/1537876"/>
            <draw:equation draw:name="f64" draw:formula="1507247*logwidth/3031136"/>
            <draw:equation draw:name="f65" draw:formula="436880*logheight/1537876"/>
            <draw:equation draw:name="f66" draw:formula="1495455*logwidth/3031136"/>
            <draw:equation draw:name="f67" draw:formula="389638*logheight/1537876"/>
            <draw:equation draw:name="f68" draw:formula="1684990*logwidth/3031136"/>
            <draw:equation draw:name="f69" draw:formula="214456*logheight/1537876"/>
            <draw:equation draw:name="f70" draw:formula="1535492*logwidth/3031136"/>
            <draw:equation draw:name="f71" draw:formula="425473*logheight/1537876"/>
            <draw:equation draw:name="f72" draw:formula="1954695*logwidth/3031136"/>
            <draw:equation draw:name="f73" draw:formula="287457*logheight/1537876"/>
            <draw:equation draw:name="f74" draw:formula="2060542*logwidth/3031136"/>
            <draw:equation draw:name="f75" draw:formula="189742*logheight/1537876"/>
            <draw:equation draw:name="f76" draw:formula="2078231*logwidth/3031136"/>
            <draw:equation draw:name="f77" draw:formula="180142*logheight/1537876"/>
            <draw:equation draw:name="f78" draw:formula="2060542*logwidth/3031136"/>
            <draw:equation draw:name="f79" draw:formula="189742*logheight/1537876"/>
            <draw:equation draw:name="f80" draw:formula="1991119*logwidth/3031136"/>
            <draw:equation draw:name="f81" draw:formula="278807*logheight/1537876"/>
            <draw:equation draw:name="f82" draw:formula="2803372*logwidth/3031136"/>
            <draw:equation draw:name="f83" draw:formula="210084*logheight/1537876"/>
            <draw:equation draw:name="f84" draw:formula="2002055*logwidth/3031136"/>
            <draw:equation draw:name="f85" draw:formula="322436*logheight/1537876"/>
            <draw:equation draw:name="f86" draw:formula="2297152*logwidth/3031136"/>
            <draw:equation draw:name="f87" draw:formula="441632*logheight/1537876"/>
            <draw:equation draw:name="f88" draw:formula="1969721*logwidth/3031136"/>
            <draw:equation draw:name="f89" draw:formula="330325*logheight/1537876"/>
            <draw:equation draw:name="f90" draw:formula="1551469*logwidth/3031136"/>
            <draw:equation draw:name="f91" draw:formula="460833*logheight/1537876"/>
            <draw:equation draw:name="f92" draw:formula="2069862*logwidth/3031136"/>
            <draw:equation draw:name="f93" draw:formula="665577*logheight/1537876"/>
            <draw:equation draw:name="f94" draw:formula="1525412*logwidth/3031136"/>
            <draw:equation draw:name="f95" draw:formula="470813*logheight/1537876"/>
            <draw:equation draw:name="f96" draw:formula="1120189*logwidth/3031136"/>
            <draw:equation draw:name="f97" draw:formula="657592*logheight/1537876"/>
            <draw:equation draw:name="f98" draw:formula="1798825*logwidth/3031136"/>
            <draw:equation draw:name="f99" draw:formula="955963*logheight/1537876"/>
            <draw:equation draw:name="f100" draw:formula="1074731*logwidth/3031136"/>
            <draw:equation draw:name="f101" draw:formula="682401*logheight/1537876"/>
            <draw:equation draw:name="f102" draw:formula="756905*logwidth/3031136"/>
            <draw:equation draw:name="f103" draw:formula="878685*logheight/1537876"/>
            <draw:equation draw:name="f104" draw:formula="1546809*logwidth/3031136"/>
            <draw:equation draw:name="f105" draw:formula="1204526*logheight/1537876"/>
            <draw:equation draw:name="f106" draw:formula="718294*logwidth/3031136"/>
            <draw:equation draw:name="f107" draw:formula="905110*logheight/1537876"/>
            <draw:equation draw:name="f108" draw:formula="601606*logwidth/3031136"/>
            <draw:equation draw:name="f109" draw:formula="987996*logheight/1537876"/>
            <draw:equation draw:name="f110" draw:formula="601606*logwidth/3031136"/>
            <draw:equation draw:name="f111" draw:formula="988661*logheight/1537876"/>
            <draw:equation draw:name="f112" draw:formula="600464*logwidth/3031136"/>
            <draw:equation draw:name="f113" draw:formula="998642*logheight/1537876"/>
            <draw:equation draw:name="f114" draw:formula="834031*logwidth/3031136"/>
            <draw:equation draw:name="f115" draw:formula="1284846*logheight/1537876"/>
            <draw:equation draw:name="f116" draw:formula="616917*logwidth/3031136"/>
            <draw:equation draw:name="f117" draw:formula="1156334*logheight/1537876"/>
            <draw:equation draw:name="f118" draw:formula="600464*logwidth/3031136"/>
            <draw:equation draw:name="f119" draw:formula="998642*logheight/1537876"/>
            <draw:equation draw:name="f120" draw:formula="601606*logwidth/3031136"/>
            <draw:equation draw:name="f121" draw:formula="988661*logheight/1537876"/>
            <draw:equation draw:name="f122" draw:formula="601606*logwidth/3031136"/>
            <draw:equation draw:name="f123" draw:formula="987996*logheight/1537876"/>
            <draw:equation draw:name="f124" draw:formula="598182*logwidth/3031136"/>
            <draw:equation draw:name="f125" draw:formula="990467*logheight/1537876"/>
            <draw:equation draw:name="f126" draw:formula="601701*logwidth/3031136"/>
            <draw:equation draw:name="f127" draw:formula="987520*logheight/1537876"/>
            <draw:equation draw:name="f128" draw:formula="601986*logwidth/3031136"/>
            <draw:equation draw:name="f129" draw:formula="985619*logheight/1537876"/>
            <draw:equation draw:name="f130" draw:formula="logwidth"/>
            <draw:equation draw:name="f131" draw:formula="logheight"/>
          </draw:enhanced-geometry>
        </draw:custom-shape>
        <draw:custom-shape draw:name="Freeform 13" draw:style-name="gr7" draw:text-style-name="P7" draw:layer="layout" svg:width="15.228cm" svg:height="8.427cm" svg:x="2.345cm" svg:y="10.26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drawooo:sub-view-size="3031136 1537876" draw:text-areas="0 0 ?f130 ?f131" draw:type="ooxml-non-primitive" draw:enhanced-path="M 3031137 0 L 2821916 0 C 2821916 311583 2510272 418803 2510272 418803 2510272 418803 2517880 246947 2424491 144385 2361820 75472 2163250 32698 2094112 28611 1549091 -3802 1302305 40017 1103070 213013 850388 432395 819861 534672 819861 534672 803979 592369 742259 711280 648204 783425 577069 837891 509643 837130 425098 886367 266946 978474 315162 1179415 176221 1225136 107368 1247853 7512 1285589 285 1310873 -6943 1336157 125722 1425127 141889 1435202 371557 1579302 879869 1529590 879869 1529590 1548520 1417142 1627834 1434917 2171238 1469516 2632951 1498888 3055863 1225801 2973506 860608 2866233 427452 2540133 483248 2540133 483248 2540133 483248 2684020 459295 2823342 345992 2958290 236301 3030947 95 3030947 95 Z M 2429341 552257 C 2429341 552257 2573703 553493 2636470 601874 2779976 712611 2781593 869163 2772654 894162 2739939 652728 2538231 556914 2429341 552162 2429436 551591 2429531 550926 2429626 550261 2395866 579062 2359157 609289 2319595 640276 2369713 698543 2406802 768407 2424015 852338 2474989 1101282 2236287 1253556 2236287 1253556 2360203 1130748 2488779 887223 2283267 668316 2193777 736374 2090498 807664 1973239 877337 2003481 920016 2025259 968968 2035245 1025430 2072239 1234641 1778188 1355263 1778188 1355263 1930254 1258309 2044660 1075618 1928352 903572 1861972 941593 1791502 978949 1716563 1014784 1649993 1046627 1585800 1075237 1523889 1100997 1529881 1115730 1533970 1131509 1535682 1148238 1548996 1273042 1346147 1323420 1346147 1323420 1442674 1277130 1518944 1195954 1495644 1112403 1342913 1174378 1203781 1218862 1076442 1250420 1069880 1287585 1003119 1329599 970595 1348134 959944 1354217 952906 1357734 952906 1357734 958993 1354788 964889 1351556 970595 1348134 1008159 1325606 1037070 1293479 1040018 1259069 701365 1337963 445545 1327793 227765 1327793 526095 1312584 791425 1272472 1029082 1215440 1000837 1169245 915532 1124095 733985 1096244 772596 1101282 999410 1132459 1061416 1207551 1211675 1170100 1350616 1125901 1479668 1077043 1429455 997674 1279291 920111 961275 872300 1028701 880949 1396169 903572 1505725 1067063 1653226 1009841 1787698 946536 1910948 880284 1816989 763559 1611382 653773 1232311 581913 1315905 596076 1766300 623356 1956406 855475 2071668 791410 2177039 725063 2274232 659191 2148795 531820 1908095 413575 1484328 333350 1596831 349889 2082890 375459 2312843 632767 2353165 604916 2391966 577256 2429531 549881 2429531 549690 2429531 549405 2429531 549215 2430007 545983 2430387 542656 2430672 539235 2438566 443041 2380935 263011 2197106 253031 2217838 252841 2354687 254456 2414220 381542 2437995 432395 2433621 509008 2430672 539235 2430292 543607 2429817 547029 2429531 549215 2429531 549500 2429531 549690 2429531 549881 2430672 549025 2431814 548169 2432955 547409 2431814 548360 2430577 549405 2429436 550356 2429246 551496 2429151 552257 2429151 552257 Z N">
            <draw:equation draw:name="f0" draw:formula="3031137*logwidth/3031136"/>
            <draw:equation draw:name="f1" draw:formula="0*logheight/1537876"/>
            <draw:equation draw:name="f2" draw:formula="2821916*logwidth/3031136"/>
            <draw:equation draw:name="f3" draw:formula="0*logheight/1537876"/>
            <draw:equation draw:name="f4" draw:formula="2510272*logwidth/3031136"/>
            <draw:equation draw:name="f5" draw:formula="418803*logheight/1537876"/>
            <draw:equation draw:name="f6" draw:formula="2424491*logwidth/3031136"/>
            <draw:equation draw:name="f7" draw:formula="144385*logheight/1537876"/>
            <draw:equation draw:name="f8" draw:formula="2094112*logwidth/3031136"/>
            <draw:equation draw:name="f9" draw:formula="28611*logheight/1537876"/>
            <draw:equation draw:name="f10" draw:formula="1103070*logwidth/3031136"/>
            <draw:equation draw:name="f11" draw:formula="213013*logheight/1537876"/>
            <draw:equation draw:name="f12" draw:formula="819861*logwidth/3031136"/>
            <draw:equation draw:name="f13" draw:formula="534672*logheight/1537876"/>
            <draw:equation draw:name="f14" draw:formula="648204*logwidth/3031136"/>
            <draw:equation draw:name="f15" draw:formula="783425*logheight/1537876"/>
            <draw:equation draw:name="f16" draw:formula="425098*logwidth/3031136"/>
            <draw:equation draw:name="f17" draw:formula="886367*logheight/1537876"/>
            <draw:equation draw:name="f18" draw:formula="176221*logwidth/3031136"/>
            <draw:equation draw:name="f19" draw:formula="1225136*logheight/1537876"/>
            <draw:equation draw:name="f20" draw:formula="285*logwidth/3031136"/>
            <draw:equation draw:name="f21" draw:formula="1310873*logheight/1537876"/>
            <draw:equation draw:name="f22" draw:formula="141889*logwidth/3031136"/>
            <draw:equation draw:name="f23" draw:formula="1435202*logheight/1537876"/>
            <draw:equation draw:name="f24" draw:formula="879869*logwidth/3031136"/>
            <draw:equation draw:name="f25" draw:formula="1529590*logheight/1537876"/>
            <draw:equation draw:name="f26" draw:formula="2171238*logwidth/3031136"/>
            <draw:equation draw:name="f27" draw:formula="1469516*logheight/1537876"/>
            <draw:equation draw:name="f28" draw:formula="2973506*logwidth/3031136"/>
            <draw:equation draw:name="f29" draw:formula="860608*logheight/1537876"/>
            <draw:equation draw:name="f30" draw:formula="2540133*logwidth/3031136"/>
            <draw:equation draw:name="f31" draw:formula="483248*logheight/1537876"/>
            <draw:equation draw:name="f32" draw:formula="2823342*logwidth/3031136"/>
            <draw:equation draw:name="f33" draw:formula="345992*logheight/1537876"/>
            <draw:equation draw:name="f34" draw:formula="3030947*logwidth/3031136"/>
            <draw:equation draw:name="f35" draw:formula="95*logheight/1537876"/>
            <draw:equation draw:name="f36" draw:formula="2429341*logwidth/3031136"/>
            <draw:equation draw:name="f37" draw:formula="552257*logheight/1537876"/>
            <draw:equation draw:name="f38" draw:formula="2636470*logwidth/3031136"/>
            <draw:equation draw:name="f39" draw:formula="601874*logheight/1537876"/>
            <draw:equation draw:name="f40" draw:formula="2772654*logwidth/3031136"/>
            <draw:equation draw:name="f41" draw:formula="894162*logheight/1537876"/>
            <draw:equation draw:name="f42" draw:formula="2429341*logwidth/3031136"/>
            <draw:equation draw:name="f43" draw:formula="552162*logheight/1537876"/>
            <draw:equation draw:name="f44" draw:formula="2429626*logwidth/3031136"/>
            <draw:equation draw:name="f45" draw:formula="550261*logheight/1537876"/>
            <draw:equation draw:name="f46" draw:formula="2319595*logwidth/3031136"/>
            <draw:equation draw:name="f47" draw:formula="640276*logheight/1537876"/>
            <draw:equation draw:name="f48" draw:formula="2424015*logwidth/3031136"/>
            <draw:equation draw:name="f49" draw:formula="852338*logheight/1537876"/>
            <draw:equation draw:name="f50" draw:formula="2236287*logwidth/3031136"/>
            <draw:equation draw:name="f51" draw:formula="1253556*logheight/1537876"/>
            <draw:equation draw:name="f52" draw:formula="2283267*logwidth/3031136"/>
            <draw:equation draw:name="f53" draw:formula="668316*logheight/1537876"/>
            <draw:equation draw:name="f54" draw:formula="1973239*logwidth/3031136"/>
            <draw:equation draw:name="f55" draw:formula="877337*logheight/1537876"/>
            <draw:equation draw:name="f56" draw:formula="2035245*logwidth/3031136"/>
            <draw:equation draw:name="f57" draw:formula="1025430*logheight/1537876"/>
            <draw:equation draw:name="f58" draw:formula="1778188*logwidth/3031136"/>
            <draw:equation draw:name="f59" draw:formula="1355263*logheight/1537876"/>
            <draw:equation draw:name="f60" draw:formula="1928352*logwidth/3031136"/>
            <draw:equation draw:name="f61" draw:formula="903572*logheight/1537876"/>
            <draw:equation draw:name="f62" draw:formula="1716563*logwidth/3031136"/>
            <draw:equation draw:name="f63" draw:formula="1014784*logheight/1537876"/>
            <draw:equation draw:name="f64" draw:formula="1523889*logwidth/3031136"/>
            <draw:equation draw:name="f65" draw:formula="1100997*logheight/1537876"/>
            <draw:equation draw:name="f66" draw:formula="1535682*logwidth/3031136"/>
            <draw:equation draw:name="f67" draw:formula="1148238*logheight/1537876"/>
            <draw:equation draw:name="f68" draw:formula="1346147*logwidth/3031136"/>
            <draw:equation draw:name="f69" draw:formula="1323420*logheight/1537876"/>
            <draw:equation draw:name="f70" draw:formula="1495644*logwidth/3031136"/>
            <draw:equation draw:name="f71" draw:formula="1112403*logheight/1537876"/>
            <draw:equation draw:name="f72" draw:formula="1076442*logwidth/3031136"/>
            <draw:equation draw:name="f73" draw:formula="1250420*logheight/1537876"/>
            <draw:equation draw:name="f74" draw:formula="970595*logwidth/3031136"/>
            <draw:equation draw:name="f75" draw:formula="1348134*logheight/1537876"/>
            <draw:equation draw:name="f76" draw:formula="952906*logwidth/3031136"/>
            <draw:equation draw:name="f77" draw:formula="1357734*logheight/1537876"/>
            <draw:equation draw:name="f78" draw:formula="970595*logwidth/3031136"/>
            <draw:equation draw:name="f79" draw:formula="1348134*logheight/1537876"/>
            <draw:equation draw:name="f80" draw:formula="1040018*logwidth/3031136"/>
            <draw:equation draw:name="f81" draw:formula="1259069*logheight/1537876"/>
            <draw:equation draw:name="f82" draw:formula="227765*logwidth/3031136"/>
            <draw:equation draw:name="f83" draw:formula="1327793*logheight/1537876"/>
            <draw:equation draw:name="f84" draw:formula="1029082*logwidth/3031136"/>
            <draw:equation draw:name="f85" draw:formula="1215440*logheight/1537876"/>
            <draw:equation draw:name="f86" draw:formula="733985*logwidth/3031136"/>
            <draw:equation draw:name="f87" draw:formula="1096244*logheight/1537876"/>
            <draw:equation draw:name="f88" draw:formula="1061416*logwidth/3031136"/>
            <draw:equation draw:name="f89" draw:formula="1207551*logheight/1537876"/>
            <draw:equation draw:name="f90" draw:formula="1479668*logwidth/3031136"/>
            <draw:equation draw:name="f91" draw:formula="1077043*logheight/1537876"/>
            <draw:equation draw:name="f92" draw:formula="961275*logwidth/3031136"/>
            <draw:equation draw:name="f93" draw:formula="872300*logheight/1537876"/>
            <draw:equation draw:name="f94" draw:formula="1505725*logwidth/3031136"/>
            <draw:equation draw:name="f95" draw:formula="1067063*logheight/1537876"/>
            <draw:equation draw:name="f96" draw:formula="1910948*logwidth/3031136"/>
            <draw:equation draw:name="f97" draw:formula="880284*logheight/1537876"/>
            <draw:equation draw:name="f98" draw:formula="1232311*logwidth/3031136"/>
            <draw:equation draw:name="f99" draw:formula="581913*logheight/1537876"/>
            <draw:equation draw:name="f100" draw:formula="1956406*logwidth/3031136"/>
            <draw:equation draw:name="f101" draw:formula="855475*logheight/1537876"/>
            <draw:equation draw:name="f102" draw:formula="2274232*logwidth/3031136"/>
            <draw:equation draw:name="f103" draw:formula="659191*logheight/1537876"/>
            <draw:equation draw:name="f104" draw:formula="1484328*logwidth/3031136"/>
            <draw:equation draw:name="f105" draw:formula="333350*logheight/1537876"/>
            <draw:equation draw:name="f106" draw:formula="2312843*logwidth/3031136"/>
            <draw:equation draw:name="f107" draw:formula="632767*logheight/1537876"/>
            <draw:equation draw:name="f108" draw:formula="2429531*logwidth/3031136"/>
            <draw:equation draw:name="f109" draw:formula="549881*logheight/1537876"/>
            <draw:equation draw:name="f110" draw:formula="2429531*logwidth/3031136"/>
            <draw:equation draw:name="f111" draw:formula="549215*logheight/1537876"/>
            <draw:equation draw:name="f112" draw:formula="2430672*logwidth/3031136"/>
            <draw:equation draw:name="f113" draw:formula="539235*logheight/1537876"/>
            <draw:equation draw:name="f114" draw:formula="2197106*logwidth/3031136"/>
            <draw:equation draw:name="f115" draw:formula="253031*logheight/1537876"/>
            <draw:equation draw:name="f116" draw:formula="2414220*logwidth/3031136"/>
            <draw:equation draw:name="f117" draw:formula="381542*logheight/1537876"/>
            <draw:equation draw:name="f118" draw:formula="2430672*logwidth/3031136"/>
            <draw:equation draw:name="f119" draw:formula="539235*logheight/1537876"/>
            <draw:equation draw:name="f120" draw:formula="2429531*logwidth/3031136"/>
            <draw:equation draw:name="f121" draw:formula="549215*logheight/1537876"/>
            <draw:equation draw:name="f122" draw:formula="2429531*logwidth/3031136"/>
            <draw:equation draw:name="f123" draw:formula="549881*logheight/1537876"/>
            <draw:equation draw:name="f124" draw:formula="2432955*logwidth/3031136"/>
            <draw:equation draw:name="f125" draw:formula="547409*logheight/1537876"/>
            <draw:equation draw:name="f126" draw:formula="2429436*logwidth/3031136"/>
            <draw:equation draw:name="f127" draw:formula="550356*logheight/1537876"/>
            <draw:equation draw:name="f128" draw:formula="2429151*logwidth/3031136"/>
            <draw:equation draw:name="f129" draw:formula="552257*logheight/1537876"/>
            <draw:equation draw:name="f130" draw:formula="logwidth"/>
            <draw:equation draw:name="f131" draw:formula="logheight"/>
          </draw:enhanced-geometry>
        </draw:custom-shape>
        <draw:custom-shape draw:name="Freeform 14" draw:style-name="gr8" draw:text-style-name="P8" draw:layer="layout" svg:width="15.228cm" svg:height="8.427cm" svg:x="17.589cm" svg:y="10.26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drawooo:sub-view-size="3031129 1537904" draw:text-areas="0 0 ?f130 ?f131" draw:type="ooxml-non-primitive" draw:enhanced-path="M 207794 345992 C 347117 459200 491004 483248 491004 483248 491004 483248 164904 427548 57631 860608 -24726 1225801 398186 1498983 859898 1469516 1403303 1434917 1482711 1417047 2151268 1529590 2151268 1529590 2659580 1579397 2889248 1435202 2905415 1425032 3037985 1336157 3030852 1310873 3023625 1285494 2923769 1247758 2854916 1225136 2715974 1179415 2764190 978474 2606038 886367 2521494 837130 2454068 837986 2382933 783425 2288878 711375 2227158 592369 2211276 534672 2211276 534672 2180749 432490 1928067 213013 1728831 40017 1482046 -3802 937025 28611 867887 32698 669412 75472 606646 144385 513257 247042 520865 418803 520865 418803 520865 418803 209221 311583 209221 0 L 0 0 C 0 0 72657 236206 207604 345897 Z M 601701 550451 C 600559 549500 599323 548455 598182 547504 599323 548360 600464 549120 601605 549976 601605 549785 601605 549500 601605 549310 601320 547124 600940 543702 600464 539330 597516 509008 593046 432490 616917 381637 676449 254551 813394 253031 834031 253126 650202 263106 592476 443136 600464 539330 600750 542752 601130 546078 601605 549310 601605 549500 601605 549785 601605 549976 639170 577351 678066 605011 718294 632862 948342 375459 1434305 349984 1546809 333445 1123041 413670 882342 532011 756905 659286 854097 725158 959469 791505 1074730 855570 1264931 623451 1715232 596266 1798825 582008 1419755 653963 1214148 763654 1120188 880379 1243439 946631 1377815 1009936 1525412 1067158 1634967 903667 2002436 881044 2069861 872395 1751846 920206 1601777 997769 1551469 1077138 1680520 1126091 1819462 1170195 1969721 1207646 2031631 1132459 2258541 1101377 2297152 1096339 2115605 1124189 2030300 1169339 2002055 1215535 2239711 1272567 2505041 1312679 2803372 1327888 2585592 1327888 2329771 1338153 1991119 1259164 1994162 1293574 2022977 1325701 2060542 1348229 2066248 1351651 2072144 1354883 2078230 1357829 2078230 1357829 2071193 1354312 2060542 1348229 2027922 1329694 1961162 1287585 1954695 1250515 1827356 1218957 1688224 1174472 1535492 1112498 1512192 1196050 1588463 1277224 1684990 1323515 1684990 1323515 1482141 1273042 1495455 1148333 1497262 1131509 1501351 1115825 1507247 1101092 1445337 1075332 1381144 1046721 1314574 1014879 1239634 979044 1169165 941688 1102785 903667 986477 1075713 1100883 1258499 1252949 1355358 1252949 1355358 958993 1234736 995892 1025525 1005878 969063 1027656 920111 1057898 877432 940544 807759 837360 736469 747870 668411 542358 887318 671029 1130938 794850 1253652 794850 1253652 556243 1101377 607121 852434 624335 768502 661424 698733 711542 640371 671980 609384 635176 579157 601511 550356 601511 550926 601701 551591 601796 552257 492810 557009 291198 652728 258483 894257 249544 869258 251255 712706 394667 601969 457338 553588 601796 552352 601796 552352 601796 552352 601701 551687 601511 550451 Z N">
            <draw:equation draw:name="f0" draw:formula="207794*logwidth/3031129"/>
            <draw:equation draw:name="f1" draw:formula="345992*logheight/1537904"/>
            <draw:equation draw:name="f2" draw:formula="491004*logwidth/3031129"/>
            <draw:equation draw:name="f3" draw:formula="483248*logheight/1537904"/>
            <draw:equation draw:name="f4" draw:formula="57631*logwidth/3031129"/>
            <draw:equation draw:name="f5" draw:formula="860608*logheight/1537904"/>
            <draw:equation draw:name="f6" draw:formula="859898*logwidth/3031129"/>
            <draw:equation draw:name="f7" draw:formula="1469516*logheight/1537904"/>
            <draw:equation draw:name="f8" draw:formula="2151268*logwidth/3031129"/>
            <draw:equation draw:name="f9" draw:formula="1529590*logheight/1537904"/>
            <draw:equation draw:name="f10" draw:formula="2889248*logwidth/3031129"/>
            <draw:equation draw:name="f11" draw:formula="1435202*logheight/1537904"/>
            <draw:equation draw:name="f12" draw:formula="3030852*logwidth/3031129"/>
            <draw:equation draw:name="f13" draw:formula="1310873*logheight/1537904"/>
            <draw:equation draw:name="f14" draw:formula="2854916*logwidth/3031129"/>
            <draw:equation draw:name="f15" draw:formula="1225136*logheight/1537904"/>
            <draw:equation draw:name="f16" draw:formula="2606038*logwidth/3031129"/>
            <draw:equation draw:name="f17" draw:formula="886367*logheight/1537904"/>
            <draw:equation draw:name="f18" draw:formula="2382933*logwidth/3031129"/>
            <draw:equation draw:name="f19" draw:formula="783425*logheight/1537904"/>
            <draw:equation draw:name="f20" draw:formula="2211276*logwidth/3031129"/>
            <draw:equation draw:name="f21" draw:formula="534672*logheight/1537904"/>
            <draw:equation draw:name="f22" draw:formula="1928067*logwidth/3031129"/>
            <draw:equation draw:name="f23" draw:formula="213013*logheight/1537904"/>
            <draw:equation draw:name="f24" draw:formula="937025*logwidth/3031129"/>
            <draw:equation draw:name="f25" draw:formula="28611*logheight/1537904"/>
            <draw:equation draw:name="f26" draw:formula="606646*logwidth/3031129"/>
            <draw:equation draw:name="f27" draw:formula="144385*logheight/1537904"/>
            <draw:equation draw:name="f28" draw:formula="520865*logwidth/3031129"/>
            <draw:equation draw:name="f29" draw:formula="418803*logheight/1537904"/>
            <draw:equation draw:name="f30" draw:formula="209221*logwidth/3031129"/>
            <draw:equation draw:name="f31" draw:formula="0*logheight/1537904"/>
            <draw:equation draw:name="f32" draw:formula="0*logwidth/3031129"/>
            <draw:equation draw:name="f33" draw:formula="0*logheight/1537904"/>
            <draw:equation draw:name="f34" draw:formula="207604*logwidth/3031129"/>
            <draw:equation draw:name="f35" draw:formula="345897*logheight/1537904"/>
            <draw:equation draw:name="f36" draw:formula="601701*logwidth/3031129"/>
            <draw:equation draw:name="f37" draw:formula="550451*logheight/1537904"/>
            <draw:equation draw:name="f38" draw:formula="598182*logwidth/3031129"/>
            <draw:equation draw:name="f39" draw:formula="547504*logheight/1537904"/>
            <draw:equation draw:name="f40" draw:formula="601605*logwidth/3031129"/>
            <draw:equation draw:name="f41" draw:formula="549976*logheight/1537904"/>
            <draw:equation draw:name="f42" draw:formula="601605*logwidth/3031129"/>
            <draw:equation draw:name="f43" draw:formula="549310*logheight/1537904"/>
            <draw:equation draw:name="f44" draw:formula="600464*logwidth/3031129"/>
            <draw:equation draw:name="f45" draw:formula="539330*logheight/1537904"/>
            <draw:equation draw:name="f46" draw:formula="616917*logwidth/3031129"/>
            <draw:equation draw:name="f47" draw:formula="381637*logheight/1537904"/>
            <draw:equation draw:name="f48" draw:formula="834031*logwidth/3031129"/>
            <draw:equation draw:name="f49" draw:formula="253126*logheight/1537904"/>
            <draw:equation draw:name="f50" draw:formula="600464*logwidth/3031129"/>
            <draw:equation draw:name="f51" draw:formula="539330*logheight/1537904"/>
            <draw:equation draw:name="f52" draw:formula="601605*logwidth/3031129"/>
            <draw:equation draw:name="f53" draw:formula="549310*logheight/1537904"/>
            <draw:equation draw:name="f54" draw:formula="601605*logwidth/3031129"/>
            <draw:equation draw:name="f55" draw:formula="549976*logheight/1537904"/>
            <draw:equation draw:name="f56" draw:formula="718294*logwidth/3031129"/>
            <draw:equation draw:name="f57" draw:formula="632862*logheight/1537904"/>
            <draw:equation draw:name="f58" draw:formula="1546809*logwidth/3031129"/>
            <draw:equation draw:name="f59" draw:formula="333445*logheight/1537904"/>
            <draw:equation draw:name="f60" draw:formula="756905*logwidth/3031129"/>
            <draw:equation draw:name="f61" draw:formula="659286*logheight/1537904"/>
            <draw:equation draw:name="f62" draw:formula="1074730*logwidth/3031129"/>
            <draw:equation draw:name="f63" draw:formula="855570*logheight/1537904"/>
            <draw:equation draw:name="f64" draw:formula="1798825*logwidth/3031129"/>
            <draw:equation draw:name="f65" draw:formula="582008*logheight/1537904"/>
            <draw:equation draw:name="f66" draw:formula="1120188*logwidth/3031129"/>
            <draw:equation draw:name="f67" draw:formula="880379*logheight/1537904"/>
            <draw:equation draw:name="f68" draw:formula="1525412*logwidth/3031129"/>
            <draw:equation draw:name="f69" draw:formula="1067158*logheight/1537904"/>
            <draw:equation draw:name="f70" draw:formula="2069861*logwidth/3031129"/>
            <draw:equation draw:name="f71" draw:formula="872395*logheight/1537904"/>
            <draw:equation draw:name="f72" draw:formula="1551469*logwidth/3031129"/>
            <draw:equation draw:name="f73" draw:formula="1077138*logheight/1537904"/>
            <draw:equation draw:name="f74" draw:formula="1969721*logwidth/3031129"/>
            <draw:equation draw:name="f75" draw:formula="1207646*logheight/1537904"/>
            <draw:equation draw:name="f76" draw:formula="2297152*logwidth/3031129"/>
            <draw:equation draw:name="f77" draw:formula="1096339*logheight/1537904"/>
            <draw:equation draw:name="f78" draw:formula="2002055*logwidth/3031129"/>
            <draw:equation draw:name="f79" draw:formula="1215535*logheight/1537904"/>
            <draw:equation draw:name="f80" draw:formula="2803372*logwidth/3031129"/>
            <draw:equation draw:name="f81" draw:formula="1327888*logheight/1537904"/>
            <draw:equation draw:name="f82" draw:formula="1991119*logwidth/3031129"/>
            <draw:equation draw:name="f83" draw:formula="1259164*logheight/1537904"/>
            <draw:equation draw:name="f84" draw:formula="2060542*logwidth/3031129"/>
            <draw:equation draw:name="f85" draw:formula="1348229*logheight/1537904"/>
            <draw:equation draw:name="f86" draw:formula="2078230*logwidth/3031129"/>
            <draw:equation draw:name="f87" draw:formula="1357829*logheight/1537904"/>
            <draw:equation draw:name="f88" draw:formula="2060542*logwidth/3031129"/>
            <draw:equation draw:name="f89" draw:formula="1348229*logheight/1537904"/>
            <draw:equation draw:name="f90" draw:formula="1954695*logwidth/3031129"/>
            <draw:equation draw:name="f91" draw:formula="1250515*logheight/1537904"/>
            <draw:equation draw:name="f92" draw:formula="1535492*logwidth/3031129"/>
            <draw:equation draw:name="f93" draw:formula="1112498*logheight/1537904"/>
            <draw:equation draw:name="f94" draw:formula="1684990*logwidth/3031129"/>
            <draw:equation draw:name="f95" draw:formula="1323515*logheight/1537904"/>
            <draw:equation draw:name="f96" draw:formula="1495455*logwidth/3031129"/>
            <draw:equation draw:name="f97" draw:formula="1148333*logheight/1537904"/>
            <draw:equation draw:name="f98" draw:formula="1507247*logwidth/3031129"/>
            <draw:equation draw:name="f99" draw:formula="1101092*logheight/1537904"/>
            <draw:equation draw:name="f100" draw:formula="1314574*logwidth/3031129"/>
            <draw:equation draw:name="f101" draw:formula="1014879*logheight/1537904"/>
            <draw:equation draw:name="f102" draw:formula="1102785*logwidth/3031129"/>
            <draw:equation draw:name="f103" draw:formula="903667*logheight/1537904"/>
            <draw:equation draw:name="f104" draw:formula="1252949*logwidth/3031129"/>
            <draw:equation draw:name="f105" draw:formula="1355358*logheight/1537904"/>
            <draw:equation draw:name="f106" draw:formula="995892*logwidth/3031129"/>
            <draw:equation draw:name="f107" draw:formula="1025525*logheight/1537904"/>
            <draw:equation draw:name="f108" draw:formula="1057898*logwidth/3031129"/>
            <draw:equation draw:name="f109" draw:formula="877432*logheight/1537904"/>
            <draw:equation draw:name="f110" draw:formula="747870*logwidth/3031129"/>
            <draw:equation draw:name="f111" draw:formula="668411*logheight/1537904"/>
            <draw:equation draw:name="f112" draw:formula="794850*logwidth/3031129"/>
            <draw:equation draw:name="f113" draw:formula="1253652*logheight/1537904"/>
            <draw:equation draw:name="f114" draw:formula="607121*logwidth/3031129"/>
            <draw:equation draw:name="f115" draw:formula="852434*logheight/1537904"/>
            <draw:equation draw:name="f116" draw:formula="711542*logwidth/3031129"/>
            <draw:equation draw:name="f117" draw:formula="640371*logheight/1537904"/>
            <draw:equation draw:name="f118" draw:formula="601511*logwidth/3031129"/>
            <draw:equation draw:name="f119" draw:formula="550356*logheight/1537904"/>
            <draw:equation draw:name="f120" draw:formula="601796*logwidth/3031129"/>
            <draw:equation draw:name="f121" draw:formula="552257*logheight/1537904"/>
            <draw:equation draw:name="f122" draw:formula="258483*logwidth/3031129"/>
            <draw:equation draw:name="f123" draw:formula="894257*logheight/1537904"/>
            <draw:equation draw:name="f124" draw:formula="394667*logwidth/3031129"/>
            <draw:equation draw:name="f125" draw:formula="601969*logheight/1537904"/>
            <draw:equation draw:name="f126" draw:formula="601796*logwidth/3031129"/>
            <draw:equation draw:name="f127" draw:formula="552352*logheight/1537904"/>
            <draw:equation draw:name="f128" draw:formula="601511*logwidth/3031129"/>
            <draw:equation draw:name="f129" draw:formula="550451*logheight/1537904"/>
            <draw:equation draw:name="f130" draw:formula="logwidth"/>
            <draw:equation draw:name="f131" draw:formula="logheight"/>
          </draw:enhanced-geometry>
        </draw:custom-shape>
        <draw:custom-shape draw:name="TextBox 109" draw:style-name="gr9" draw:text-style-name="P10" draw:layer="layout" svg:width="14.807cm" svg:height="6.157cm" svg:x="2.52cm" svg:y="3.61cm">
          <text:list text:style-name="L2">
            <text:list-item>
              <text:p text:style-name="P9"><text:span text:style-name="T1">SI déjà homogène sur l'ensemble du réseau (ERP, caisses, TPE, site web et application mutualisés)</text:span></text:p>
            </text:list-item>
            <text:list-item>
              <text:p text:style-name="P9"><text:span text:style-name="T1">Processus de commande déjà numérisés (téléphone, site web, application mobile)</text:span></text:p>
            </text:list-item>
            <text:list-item>
              <text:p text:style-name="P9"><text:span text:style-name="T1">Standardisation des caisses et des moyens de paiement sur tous les franchisés, facilitant la maintenance</text:span></text:p>
            </text:list-item>
            <text:list-item>
              <text:p text:style-name="P9"><text:span text:style-name="T1">Site web et application mutualisés offrant une expérience client cohérente</text:span></text:p>
            </text:list-item>
            <text:list-item>
              <text:p text:style-name="P9"><text:span text:style-name="T1">Réseau de franchise stable de 25 franchisés avec un fonctionnement éprouvé</text:span></text:p>
            </text:list-item>
            <text:list-item>
              <text:p text:style-name="P9"><text:span text:style-name="T1">Applications déjà utilisées par les franchisés pour consulter les command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 draw:style-name="gr10" draw:text-style-name="P12" draw:layer="layout" svg:width="14.807cm" svg:height="6.921cm" svg:x="18.176cm" svg:y="3.363cm">
          <text:list text:style-name="L2">
            <text:list-item>
              <text:p text:style-name="P11"><text:span text:style-name="T1">ERP vieillissant, coûteux et développé par un éditeur qui n'innove plus, limitant les évolutions futures</text:span></text:p>
            </text:list-item>
            <text:list-item>
              <text:p text:style-name="P11"><text:span text:style-name="T1">Transmission des ventes et encaissements uniquement en fin de journée vers l'ERP : absence de données en temps réel</text:span></text:p>
            </text:list-item>
            <text:list-item>
              <text:p text:style-name="P11"><text:span text:style-name="T1">Dépendance à un prestataire logistique unique (« Je livre »), limité à la région actuelle</text:span></text:p>
            </text:list-item>
            <text:list-item>
              <text:p text:style-name="P11"><text:span text:style-name="T1">Pas de livraison à domicile, seulement des livraisons le week-end pour les commandes de plus de 10 personnes</text:span></text:p>
            </text:list-item>
            <text:list-item>
              <text:p text:style-name="P11"><text:span text:style-name="T1">Click &amp; Collect peu flexible : commande obligatoire au moins 3 heures à l'avance, freinant les ventes du déjeuner</text:span></text:p>
            </text:list-item>
            <text:list-item>
              <text:p text:style-name="P11"><text:span text:style-name="T1">Peu d'informations sur le pilotage (tableaux de bord, BI, CRM ou suivi cli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11" draw:text-style-name="P14" draw:layer="layout" svg:width="7.462cm" svg:height="0.844cm" draw:transform="rotate (1.5707963267949) translate (1.001cm 17.725cm)">
          <text:p text:style-name="P13"><text:span text:style-name="T2">FACTEURS </text:span><text:span text:style-name="T3">EXT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2" draw:text-style-name="P14" draw:layer="layout" svg:width="7.781cm" svg:height="0.844cm" draw:transform="rotate (1.5707963267949) translate (0.996cm 10.261cm)">
          <text:p text:style-name="P13"><text:span text:style-name="T2">FACTEURS </text:span><text:span text:style-name="T4">INT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0" draw:style-name="gr13" draw:text-style-name="P14" draw:layer="layout" svg:width="15.189cm" svg:height="1.013cm" svg:x="2.013cm" svg:y="2.48cm">
          <text:p text:style-name="P13"><text:span text:style-name="T5">FOR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1" draw:style-name="gr14" draw:text-style-name="P14" draw:layer="layout" svg:width="15.189cm" svg:height="1.013cm" svg:x="17.73cm" svg:y="2.48cm">
          <text:p text:style-name="P13"><text:span text:style-name="T5">FAIBLES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 draw:style-name="gr15" draw:text-style-name="P12" draw:layer="layout" svg:width="14.807cm" svg:height="6.345cm" svg:x="2.5cm" svg:y="11.657cm">
          <text:list text:style-name="L2">
            <text:list-item>
              <text:p text:style-name="P11"><text:span text:style-name="T1">Remplacement de l'ERP par une solution moderne, plus évolutive et mieux intégrée</text:span></text:p>
            </text:list-item>
            <text:list-item>
              <text:p text:style-name="P11"><text:span text:style-name="T1">Déploiement de la livraison à domicile afin d'augmenter le chiffre d'affaires</text:span></text:p>
            </text:list-item>
            <text:list-item>
              <text:p text:style-name="P11"><text:span text:style-name="T1">Extension du réseau dans d'autres régions grâce à une logistique nationale</text:span></text:p>
            </text:list-item>
            <text:list-item>
              <text:p text:style-name="P11"><text:span text:style-name="T1">Mise en place d'une gestion en temps réel des ventes, des stocks et des commandes</text:span></text:p>
            </text:list-item>
            <text:list-item>
              <text:p text:style-name="P11"><text:span text:style-name="T1">Exploitation des données clients (CRM, fidélisation, tableaux de bord décisionnels)</text:span></text:p>
            </text:list-item>
            <text:list-item>
              <text:p text:style-name="P11"><text:span text:style-name="T1">Développement du Click &amp; Collect rapide pour capter la clientèle du déjeuner</text:span></text:p>
            </text:list-item>
            <text:list-item>
              <text:p text:style-name="P11"><text:span text:style-name="T1">Réseau relationnel du fondateur et de son fils facilitant l'ouverture de nouvelles franchis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16" draw:text-style-name="P12" draw:layer="layout" svg:width="14.807cm" svg:height="6.727cm" svg:x="18.129cm" svg:y="11.474cm">
          <text:list text:style-name="L2">
            <text:list-item>
              <text:p text:style-name="P11"><text:span text:style-name="T1">Échec ou retard du projet de migration ERP pouvant perturber l'activité</text:span></text:p>
            </text:list-item>
            <text:list-item>
              <text:p text:style-name="P11"><text:span text:style-name="T1">Forte dépendance aux prestataires externes (ERP, hébergement, logistique)</text:span></text:p>
            </text:list-item>
            <text:list-item>
              <text:p text:style-name="P11"><text:span text:style-name="T1">Cyberattaques ou indisponibilité du site web et de l'application mobile</text:span></text:p>
            </text:list-item>
            <text:list-item>
              <text:p text:style-name="P11"><text:span text:style-name="T1">Difficultés d'adoption des nouveaux outils par les franchisés et les équipes</text:span></text:p>
            </text:list-item>
            <text:list-item>
              <text:p text:style-name="P11"><text:span text:style-name="T1">Coûts élevés des projets de transformation numérique</text:span></text:p>
            </text:list-item>
            <text:list-item>
              <text:p text:style-name="P11"><text:span text:style-name="T1">Concurrence de plateformes de livraison et de traiteurs déjà fortement digitalisés</text:span></text:p>
            </text:list-item>
            <text:list-item>
              <text:p text:style-name="P11"><text:span text:style-name="T1">Croissance du réseau pouvant rendre le SI actuel insuffisant en termes de performances et de scalabilit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2" draw:style-name="gr17" draw:text-style-name="P14" draw:layer="layout" svg:width="15.189cm" svg:height="1.013cm" svg:x="1.987cm" svg:y="10.463cm">
          <text:p text:style-name="P13"><text:span text:style-name="T5">OPPORTUNITÉ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3" draw:style-name="gr18" draw:text-style-name="P14" draw:layer="layout" svg:width="15.189cm" svg:height="1.013cm" svg:x="17.703cm" svg:y="10.463cm">
          <text:p text:style-name="P13"><text:span text:style-name="T5">MENA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9"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Century Gothic" svg:font-family="'Century Goth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msFillGradient_20_1" draw:display-name="msFillGradient 1" draw:style="linear" draw:start-color="#f2f2f2" draw:end-color="#bfbfbf" draw:start-intensity="100%" draw:end-intensity="100%" draw:angle="225deg" draw:border="0%">
      <loext:gradient-stop svg:offset="0" loext:color-type="rgb" loext:color-value="#f2f2f2"/>
      <loext:gradient-stop svg:offset="1" loext:color-type="rgb" loext:color-value="#bfbfbf"/>
    </draw:gradient>
    <draw:gradient draw:name="msFillGradient_20_10" draw:display-name="msFillGradient 10" draw:style="linear" draw:start-color="#f2f2f2" draw:end-color="#bfbfbf" draw:start-intensity="100%" draw:end-intensity="100%" draw:angle="225deg" draw:border="0%">
      <loext:gradient-stop svg:offset="0" loext:color-type="rgb" loext:color-value="#f2f2f2"/>
      <loext:gradient-stop svg:offset="1" loext:color-type="rgb" loext:color-value="#bfbfbf"/>
    </draw:gradient>
    <draw:gradient draw:name="msFillGradient_20_11" draw:display-name="msFillGradient 11" draw:style="linear" draw:start-color="#f2f2f2" draw:end-color="#bfbfbf" draw:start-intensity="100%" draw:end-intensity="100%" draw:angle="225deg" draw:border="0%">
      <loext:gradient-stop svg:offset="0" loext:color-type="rgb" loext:color-value="#f2f2f2"/>
      <loext:gradient-stop svg:offset="1" loext:color-type="rgb" loext:color-value="#bfbfbf"/>
    </draw:gradient>
    <draw:gradient draw:name="msFillGradient_20_2" draw:display-name="msFillGradient 2" draw:style="linear" draw:start-color="#f2f2f2" draw:end-color="#bfbfbf" draw:start-intensity="100%" draw:end-intensity="100%" draw:angle="225deg" draw:border="0%">
      <loext:gradient-stop svg:offset="0" loext:color-type="rgb" loext:color-value="#f2f2f2"/>
      <loext:gradient-stop svg:offset="1" loext:color-type="rgb" loext:color-value="#bfbfbf"/>
    </draw:gradient>
    <draw:gradient draw:name="msFillGradient_20_3" draw:display-name="msFillGradient 3" draw:style="linear" draw:start-color="#f2f2f2" draw:end-color="#bfbfbf" draw:start-intensity="100%" draw:end-intensity="100%" draw:angle="225deg" draw:border="0%">
      <loext:gradient-stop svg:offset="0" loext:color-type="rgb" loext:color-value="#f2f2f2"/>
      <loext:gradient-stop svg:offset="1" loext:color-type="rgb" loext:color-value="#bfbfbf"/>
    </draw:gradient>
    <draw:gradient draw:name="msFillGradient_20_4" draw:display-name="msFillGradient 4" draw:style="linear" draw:start-color="#f2f2f2" draw:end-color="#bfbfbf" draw:start-intensity="100%" draw:end-intensity="100%" draw:angle="225deg" draw:border="0%">
      <loext:gradient-stop svg:offset="0" loext:color-type="rgb" loext:color-value="#f2f2f2"/>
      <loext:gradient-stop svg:offset="1" loext:color-type="rgb" loext:color-value="#bfbfbf"/>
    </draw:gradient>
    <draw:gradient draw:name="msFillGradient_20_5" draw:display-name="msFillGradient 5" draw:style="linear" draw:start-color="#f2f2f2" draw:end-color="#bfbfbf" draw:start-intensity="100%" draw:end-intensity="100%" draw:angle="225deg" draw:border="0%">
      <loext:gradient-stop svg:offset="0" loext:color-type="rgb" loext:color-value="#f2f2f2"/>
      <loext:gradient-stop svg:offset="1" loext:color-type="rgb" loext:color-value="#bfbfbf"/>
    </draw:gradient>
    <draw:gradient draw:name="msFillGradient_20_6" draw:display-name="msFillGradient 6" draw:style="linear" draw:start-color="#f2f2f2" draw:end-color="#bfbfbf" draw:start-intensity="100%" draw:end-intensity="100%" draw:angle="225deg" draw:border="0%">
      <loext:gradient-stop svg:offset="0" loext:color-type="rgb" loext:color-value="#f2f2f2"/>
      <loext:gradient-stop svg:offset="1" loext:color-type="rgb" loext:color-value="#bfbfbf"/>
    </draw:gradient>
    <draw:gradient draw:name="msFillGradient_20_7" draw:display-name="msFillGradient 7" draw:style="linear" draw:start-color="#f2f2f2" draw:end-color="#bfbfbf" draw:start-intensity="100%" draw:end-intensity="100%" draw:angle="225deg" draw:border="0%">
      <loext:gradient-stop svg:offset="0" loext:color-type="rgb" loext:color-value="#f2f2f2"/>
      <loext:gradient-stop svg:offset="1" loext:color-type="rgb" loext:color-value="#bfbfbf"/>
    </draw:gradient>
    <draw:gradient draw:name="msFillGradient_20_8" draw:display-name="msFillGradient 8" draw:style="linear" draw:start-color="#f2f2f2" draw:end-color="#bfbfbf" draw:start-intensity="100%" draw:end-intensity="100%" draw:angle="225deg" draw:border="0%">
      <loext:gradient-stop svg:offset="0" loext:color-type="rgb" loext:color-value="#f2f2f2"/>
      <loext:gradient-stop svg:offset="1" loext:color-type="rgb" loext:color-value="#bfbfbf"/>
    </draw:gradient>
    <draw:gradient draw:name="msFillGradient_20_9" draw:display-name="msFillGradient 9" draw:style="linear" draw:start-color="#f2f2f2" draw:end-color="#bfbfbf" draw:start-intensity="100%" draw:end-intensity="100%" draw:angle="225deg" draw:border="0%">
      <loext:gradient-stop svg:offset="0" loext:color-type="rgb" loext:color-value="#f2f2f2"/>
      <loext:gradient-stop svg:offset="1" loext:color-type="rgb" loext:color-value="#bfbfbf"/>
    </draw:gradient>
    <draw:opacity draw:name="msTransGradient_20_1" draw:display-name="msTransGradient 1" draw:style="linear" draw:start="40%" draw:end="100%" draw:angle="225deg" draw:border="0%">
      <loext:opacity-stop svg:offset="0" svg:stop-opacity="0.4"/>
      <loext:opacity-stop svg:offset="1" svg:stop-opacity="1"/>
    </draw:opacity>
    <draw:opacity draw:name="msTransGradient_20_10" draw:display-name="msTransGradient 10" draw:style="linear" draw:start="40%" draw:end="100%" draw:angle="225deg" draw:border="0%">
      <loext:opacity-stop svg:offset="0" svg:stop-opacity="0.4"/>
      <loext:opacity-stop svg:offset="1" svg:stop-opacity="1"/>
    </draw:opacity>
    <draw:opacity draw:name="msTransGradient_20_11" draw:display-name="msTransGradient 11" draw:style="linear" draw:start="40%" draw:end="100%" draw:angle="225deg" draw:border="0%">
      <loext:opacity-stop svg:offset="0" svg:stop-opacity="0.4"/>
      <loext:opacity-stop svg:offset="1" svg:stop-opacity="1"/>
    </draw:opacity>
    <draw:opacity draw:name="msTransGradient_20_2" draw:display-name="msTransGradient 2" draw:style="linear" draw:start="40%" draw:end="100%" draw:angle="225deg" draw:border="0%">
      <loext:opacity-stop svg:offset="0" svg:stop-opacity="0.4"/>
      <loext:opacity-stop svg:offset="1" svg:stop-opacity="1"/>
    </draw:opacity>
    <draw:opacity draw:name="msTransGradient_20_3" draw:display-name="msTransGradient 3" draw:style="linear" draw:start="40%" draw:end="100%" draw:angle="225deg" draw:border="0%">
      <loext:opacity-stop svg:offset="0" svg:stop-opacity="0.4"/>
      <loext:opacity-stop svg:offset="1" svg:stop-opacity="1"/>
    </draw:opacity>
    <draw:opacity draw:name="msTransGradient_20_4" draw:display-name="msTransGradient 4" draw:style="linear" draw:start="40%" draw:end="100%" draw:angle="225deg" draw:border="0%">
      <loext:opacity-stop svg:offset="0" svg:stop-opacity="0.4"/>
      <loext:opacity-stop svg:offset="1" svg:stop-opacity="1"/>
    </draw:opacity>
    <draw:opacity draw:name="msTransGradient_20_5" draw:display-name="msTransGradient 5" draw:style="linear" draw:start="40%" draw:end="100%" draw:angle="225deg" draw:border="0%">
      <loext:opacity-stop svg:offset="0" svg:stop-opacity="0.4"/>
      <loext:opacity-stop svg:offset="1" svg:stop-opacity="1"/>
    </draw:opacity>
    <draw:opacity draw:name="msTransGradient_20_6" draw:display-name="msTransGradient 6" draw:style="linear" draw:start="40%" draw:end="100%" draw:angle="225deg" draw:border="0%">
      <loext:opacity-stop svg:offset="0" svg:stop-opacity="0.4"/>
      <loext:opacity-stop svg:offset="1" svg:stop-opacity="1"/>
    </draw:opacity>
    <draw:opacity draw:name="msTransGradient_20_7" draw:display-name="msTransGradient 7" draw:style="linear" draw:start="40%" draw:end="100%" draw:angle="225deg" draw:border="0%">
      <loext:opacity-stop svg:offset="0" svg:stop-opacity="0.4"/>
      <loext:opacity-stop svg:offset="1" svg:stop-opacity="1"/>
    </draw:opacity>
    <draw:opacity draw:name="msTransGradient_20_8" draw:display-name="msTransGradient 8" draw:style="linear" draw:start="40%" draw:end="100%" draw:angle="225deg" draw:border="0%">
      <loext:opacity-stop svg:offset="0" svg:stop-opacity="0.4"/>
      <loext:opacity-stop svg:offset="1" svg:stop-opacity="1"/>
    </draw:opacity>
    <draw:opacity draw:name="msTransGradient_20_9" draw:display-name="msTransGradient 9" draw:style="linear" draw:start="40%" draw:end="100%" draw:angle="225deg" draw:border="0%">
      <loext:opacity-stop svg:offset="0" svg:stop-opacity="0.4"/>
      <loext:opacity-stop svg:offset="1" svg:stop-opacity="1"/>
    </draw:opacity>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Титульный_20_слайд-background" style:display-name="Титульный слайд-background" style:family="presentation">
      <style:graphic-properties draw:stroke="none" draw:fill="gradient" draw:fill-gradient-name="msFillGradient_20_1" draw:opacity-name="msTransGradient_20_1"/>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false" style:shrink-to-fit="true" style:writing-mode="lr-tb">
        <text:list-style style:name="Титульный_20_слайд-outline1" style:display-name="Титульны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итульный_20_слайд-outline2" style:display-name="Титульный слайд-outline2" style:family="presentation" style:parent-style-name="Титульный_20_слайд-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Титульный_20_слайд-outline3" style:display-name="Титульный слайд-outline3" style:family="presentation" style:parent-style-name="Титульный_20_слайд-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итульный_20_слайд-outline4" style:display-name="Титульный слайд-outline4" style:family="presentation" style:parent-style-name="Титульный_20_слайд-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итульный_20_слайд-outline5" style:display-name="Титульный слайд-outline5" style:family="presentation" style:parent-style-name="Титульный_20_слайд-outline4">
      <style:paragraph-properties fo:margin-top="0.1cm" fo:margin-bottom="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1cm" fo:margin-bottom="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1cm" fo:margin-bottom="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1cm" fo:margin-bottom="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1cm" fo:margin-bottom="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style:writing-mode="lr-tb">
        <text:list-style style:name="Титульный_20_слайд-title" style:display-name="Титульны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вертикальный_20_текст-background" style:display-name="Заголовок и вертикальный текст-background" style:family="presentation">
      <style:graphic-properties draw:stroke="none" draw:fill="gradient" draw:fill-gradient-name="msFillGradient_20_2" draw:opacity-name="msTransGradient_20_2"/>
      <style:text-properties style:letter-kerning="true"/>
    </style:style>
    <style:style style:name="Заголовок_20_и_20_вертикальный_20_текст-backgroundobjects" style:display-name="Заголовок и вертикальный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вертикальный_20_текст-notes" style:display-name="Заголовок и вертикальный 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вертикальный_20_текст-outline1" style:display-name="Заголовок и вертикальный текст-outline1" style:family="presentation">
      <style:graphic-properties draw:stroke="none" draw:fill="none" draw:auto-grow-height="false" draw:fit-to-size="false" style:shrink-to-fit="true" style:writing-mode="lr-tb">
        <text:list-style style:name="Заголовок_20_и_20_вертикальный_20_текст-outline1" style:display-name="Заголовок и вертикальный 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вертикальный_20_текст-outline2" style:display-name="Заголовок и вертикальный текст-outline2" style:family="presentation" style:parent-style-name="Заголовок_20_и_20_вертикальный_20_текс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и_20_вертикальный_20_текст-outline3" style:display-name="Заголовок и вертикальный текст-outline3" style:family="presentation" style:parent-style-name="Заголовок_20_и_20_вертикальный_20_текс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вертикальный_20_текст-outline4" style:display-name="Заголовок и вертикальный текст-outline4" style:family="presentation" style:parent-style-name="Заголовок_20_и_20_вертикальный_20_текс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вертикальный_20_текст-outline5" style:display-name="Заголовок и вертикальный текст-outline5" style:family="presentation" style:parent-style-name="Заголовок_20_и_20_вертикальный_20_текст-outline4">
      <style:paragraph-properties fo:margin-top="0.1cm" fo:margin-bottom="0cm"/>
      <style:text-properties fo:font-size="20pt" style:font-size-asian="20pt" style:font-size-complex="20pt"/>
    </style:style>
    <style:style style:name="Заголовок_20_и_20_вертикальный_20_текст-outline6" style:display-name="Заголовок и вертикальный текст-outline6" style:family="presentation" style:parent-style-name="Заголовок_20_и_20_вертикальный_20_текст-outline5">
      <style:paragraph-properties fo:margin-top="0.1cm" fo:margin-bottom="0cm"/>
      <style:text-properties fo:font-size="20pt" style:font-size-asian="20pt" style:font-size-complex="20pt"/>
    </style:style>
    <style:style style:name="Заголовок_20_и_20_вертикальный_20_текст-outline7" style:display-name="Заголовок и вертикальный текст-outline7" style:family="presentation" style:parent-style-name="Заголовок_20_и_20_вертикальный_20_текст-outline6">
      <style:paragraph-properties fo:margin-top="0.1cm" fo:margin-bottom="0cm"/>
      <style:text-properties fo:font-size="20pt" style:font-size-asian="20pt" style:font-size-complex="20pt"/>
    </style:style>
    <style:style style:name="Заголовок_20_и_20_вертикальный_20_текст-outline8" style:display-name="Заголовок и вертикальный текст-outline8" style:family="presentation" style:parent-style-name="Заголовок_20_и_20_вертикальный_20_текст-outline7">
      <style:paragraph-properties fo:margin-top="0.1cm" fo:margin-bottom="0cm"/>
      <style:text-properties fo:font-size="20pt" style:font-size-asian="20pt" style:font-size-complex="20pt"/>
    </style:style>
    <style:style style:name="Заголовок_20_и_20_вертикальный_20_текст-outline9" style:display-name="Заголовок и вертикальный текст-outline9" style:family="presentation" style:parent-style-name="Заголовок_20_и_20_вертикальный_20_текст-outline8">
      <style:paragraph-properties fo:margin-top="0.1cm" fo:margin-bottom="0cm"/>
      <style:text-properties fo:font-size="20pt" style:font-size-asian="20pt" style:font-size-complex="20pt"/>
    </style:style>
    <style:style style:name="Заголовок_20_и_20_вертикальный_20_текст-subtitle" style:display-name="Заголовок и вертикальный текст-subtitle" style:family="presentation">
      <style:graphic-properties draw:stroke="none" draw:fill="none" draw:textarea-vertical-align="middle">
        <text:list-style style:name="Заголовок_20_и_20_вертикальный_20_текст-subtitle" style:display-name="Заголовок и вертикальный 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вертикальный_20_текст-title" style:display-name="Заголовок и вертикальный текст-title" style:family="presentation">
      <style:graphic-properties draw:stroke="none" draw:fill="none" draw:textarea-vertical-align="middle" style:writing-mode="lr-tb">
        <text:list-style style:name="Заголовок_20_и_20_вертикальный_20_текст-title" style:display-name="Заголовок и вертикальный 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Вертикальный_20_заголовок_20_и_20_текст-background" style:display-name="Вертикальный заголовок и текст-background" style:family="presentation">
      <style:graphic-properties draw:stroke="none" draw:fill="gradient" draw:fill-gradient-name="msFillGradient_20_3" draw:opacity-name="msTransGradient_20_3"/>
      <style:text-properties style:letter-kerning="true"/>
    </style:style>
    <style:style style:name="Вертикальный_20_заголовок_20_и_20_текст-backgroundobjects" style:display-name="Вертикальный 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Вертикальный_20_заголовок_20_и_20_текст-notes" style:display-name="Вертикальный заголовок и 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Вертикальный_20_заголовок_20_и_20_текст-outline1" style:display-name="Вертикальный заголовок и текст-outline1" style:family="presentation">
      <style:graphic-properties draw:stroke="none" draw:fill="none" draw:auto-grow-height="false" draw:fit-to-size="false" style:shrink-to-fit="true" style:writing-mode="lr-tb">
        <text:list-style style:name="Вертикальный_20_заголовок_20_и_20_текст-outline1" style:display-name="Вертикальный заголовок и 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Вертикальный_20_заголовок_20_и_20_текст-outline2" style:display-name="Вертикальный заголовок и текст-outline2" style:family="presentation" style:parent-style-name="Вертикальный_20_заголовок_20_и_20_текс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Вертикальный_20_заголовок_20_и_20_текст-outline3" style:display-name="Вертикальный заголовок и текст-outline3" style:family="presentation" style:parent-style-name="Вертикальный_20_заголовок_20_и_20_текс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Вертикальный_20_заголовок_20_и_20_текст-outline4" style:display-name="Вертикальный заголовок и текст-outline4" style:family="presentation" style:parent-style-name="Вертикальный_20_заголовок_20_и_20_текс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Вертикальный_20_заголовок_20_и_20_текст-outline5" style:display-name="Вертикальный заголовок и текст-outline5" style:family="presentation" style:parent-style-name="Вертикальный_20_заголовок_20_и_20_текст-outline4">
      <style:paragraph-properties fo:margin-top="0.1cm" fo:margin-bottom="0cm"/>
      <style:text-properties fo:font-size="20pt" style:font-size-asian="20pt" style:font-size-complex="20pt"/>
    </style:style>
    <style:style style:name="Вертикальный_20_заголовок_20_и_20_текст-outline6" style:display-name="Вертикальный заголовок и текст-outline6" style:family="presentation" style:parent-style-name="Вертикальный_20_заголовок_20_и_20_текст-outline5">
      <style:paragraph-properties fo:margin-top="0.1cm" fo:margin-bottom="0cm"/>
      <style:text-properties fo:font-size="20pt" style:font-size-asian="20pt" style:font-size-complex="20pt"/>
    </style:style>
    <style:style style:name="Вертикальный_20_заголовок_20_и_20_текст-outline7" style:display-name="Вертикальный заголовок и текст-outline7" style:family="presentation" style:parent-style-name="Вертикальный_20_заголовок_20_и_20_текст-outline6">
      <style:paragraph-properties fo:margin-top="0.1cm" fo:margin-bottom="0cm"/>
      <style:text-properties fo:font-size="20pt" style:font-size-asian="20pt" style:font-size-complex="20pt"/>
    </style:style>
    <style:style style:name="Вертикальный_20_заголовок_20_и_20_текст-outline8" style:display-name="Вертикальный заголовок и текст-outline8" style:family="presentation" style:parent-style-name="Вертикальный_20_заголовок_20_и_20_текст-outline7">
      <style:paragraph-properties fo:margin-top="0.1cm" fo:margin-bottom="0cm"/>
      <style:text-properties fo:font-size="20pt" style:font-size-asian="20pt" style:font-size-complex="20pt"/>
    </style:style>
    <style:style style:name="Вертикальный_20_заголовок_20_и_20_текст-outline9" style:display-name="Вертикальный заголовок и текст-outline9" style:family="presentation" style:parent-style-name="Вертикальный_20_заголовок_20_и_20_текст-outline8">
      <style:paragraph-properties fo:margin-top="0.1cm" fo:margin-bottom="0cm"/>
      <style:text-properties fo:font-size="20pt" style:font-size-asian="20pt" style:font-size-complex="20pt"/>
    </style:style>
    <style:style style:name="Вертикальный_20_заголовок_20_и_20_текст-subtitle" style:display-name="Вертикальный заголовок и текст-subtitle" style:family="presentation">
      <style:graphic-properties draw:stroke="none" draw:fill="none" draw:textarea-vertical-align="middle">
        <text:list-style style:name="Вертикальный_20_заголовок_20_и_20_текст-subtitle" style:display-name="Вертикальный заголовок и 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Вертикальный_20_заголовок_20_и_20_текст-title" style:display-name="Вертикальный заголовок и текст-title" style:family="presentation">
      <style:graphic-properties draw:stroke="none" draw:fill="none" draw:textarea-vertical-align="middle" style:writing-mode="lr-tb">
        <text:list-style style:name="Вертикальный_20_заголовок_20_и_20_текст-title" style:display-name="Вертикальный заголовок и 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объект-background" style:display-name="Заголовок и объект-background" style:family="presentation">
      <style:graphic-properties draw:stroke="none" draw:fill="gradient" draw:fill-gradient-name="msFillGradient_20_4" draw:opacity-name="msTransGradient_20_4"/>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false" style:shrink-to-fit="true" style:writing-mode="lr-tb">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объект-outline2" style:display-name="Заголовок и объект-outline2" style:family="presentation" style:parent-style-name="Заголовок_20_и_20_объек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и_20_объект-outline3" style:display-name="Заголовок и объект-outline3" style:family="presentation" style:parent-style-name="Заголовок_20_и_20_объек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объект-outline4" style:display-name="Заголовок и объект-outline4" style:family="presentation" style:parent-style-name="Заголовок_20_и_20_объек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объект-outline5" style:display-name="Заголовок и объект-outline5" style:family="presentation" style:parent-style-name="Заголовок_20_и_20_объект-outline4">
      <style:paragraph-properties fo:margin-top="0.1cm" fo:margin-bottom="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1cm" fo:margin-bottom="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1cm" fo:margin-bottom="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1cm" fo:margin-bottom="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1cm" fo:margin-bottom="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style:writing-mode="lr-tb">
        <text:list-style style:name="Заголовок_20_и_20_объект-title" style:display-name="Заголовок и объек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раздела-background" style:display-name="Заголовок раздела-background" style:family="presentation">
      <style:graphic-properties draw:stroke="none" draw:fill="gradient" draw:fill-gradient-name="msFillGradient_20_5" draw:opacity-name="msTransGradient_20_5"/>
      <style:text-properties style:letter-kerning="true"/>
    </style:style>
    <style:style style:name="Заголовок_20_раздела-backgroundobjects" style:display-name="Заголовок раздела-backgroundobjects" style:family="presentation">
      <style:graphic-properties draw:textarea-horizontal-align="justify" draw:shadow="hidden" draw:shadow-offset-x="0.2cm" draw:shadow-offset-y="0.2cm" draw:shadow-color="#808080"/>
      <style:text-properties style:letter-kerning="true"/>
    </style:style>
    <style:style style:name="Заголовок_20_раздела-notes" style:display-name="Заголовок 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раздела-outline1" style:display-name="Заголовок раздела-outline1" style:family="presentation">
      <style:graphic-properties draw:stroke="none" draw:fill="none" draw:auto-grow-height="false" draw:fit-to-size="false" style:shrink-to-fit="true" style:writing-mode="lr-tb">
        <text:list-style style:name="Заголовок_20_раздела-outline1" style:display-name="Заголовок раздел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раздела-outline2" style:display-name="Заголовок раздела-outline2" style:family="presentation" style:parent-style-name="Заголовок_20_раздела-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раздела-outline3" style:display-name="Заголовок раздела-outline3" style:family="presentation" style:parent-style-name="Заголовок_20_раздела-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раздела-outline4" style:display-name="Заголовок раздела-outline4" style:family="presentation" style:parent-style-name="Заголовок_20_раздела-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раздела-outline5" style:display-name="Заголовок раздела-outline5" style:family="presentation" style:parent-style-name="Заголовок_20_раздела-outline4">
      <style:paragraph-properties fo:margin-top="0.1cm" fo:margin-bottom="0cm"/>
      <style:text-properties fo:font-size="20pt" style:font-size-asian="20pt" style:font-size-complex="20pt"/>
    </style:style>
    <style:style style:name="Заголовок_20_раздела-outline6" style:display-name="Заголовок раздела-outline6" style:family="presentation" style:parent-style-name="Заголовок_20_раздела-outline5">
      <style:paragraph-properties fo:margin-top="0.1cm" fo:margin-bottom="0cm"/>
      <style:text-properties fo:font-size="20pt" style:font-size-asian="20pt" style:font-size-complex="20pt"/>
    </style:style>
    <style:style style:name="Заголовок_20_раздела-outline7" style:display-name="Заголовок раздела-outline7" style:family="presentation" style:parent-style-name="Заголовок_20_раздела-outline6">
      <style:paragraph-properties fo:margin-top="0.1cm" fo:margin-bottom="0cm"/>
      <style:text-properties fo:font-size="20pt" style:font-size-asian="20pt" style:font-size-complex="20pt"/>
    </style:style>
    <style:style style:name="Заголовок_20_раздела-outline8" style:display-name="Заголовок раздела-outline8" style:family="presentation" style:parent-style-name="Заголовок_20_раздела-outline7">
      <style:paragraph-properties fo:margin-top="0.1cm" fo:margin-bottom="0cm"/>
      <style:text-properties fo:font-size="20pt" style:font-size-asian="20pt" style:font-size-complex="20pt"/>
    </style:style>
    <style:style style:name="Заголовок_20_раздела-outline9" style:display-name="Заголовок раздела-outline9" style:family="presentation" style:parent-style-name="Заголовок_20_раздела-outline8">
      <style:paragraph-properties fo:margin-top="0.1cm" fo:margin-bottom="0cm"/>
      <style:text-properties fo:font-size="20pt" style:font-size-asian="20pt" style:font-size-complex="20pt"/>
    </style:style>
    <style:style style:name="Заголовок_20_раздела-subtitle" style:display-name="Заголовок раздела-subtitle" style:family="presentation">
      <style:graphic-properties draw:stroke="none" draw:fill="none" draw:textarea-vertical-align="middle">
        <text:list-style style:name="Заголовок_20_раздела-subtitle" style:display-name="Заголовок раздел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раздела-title" style:display-name="Заголовок раздела-title" style:family="presentation">
      <style:graphic-properties draw:stroke="none" draw:fill="none" draw:textarea-vertical-align="middle" style:writing-mode="lr-tb">
        <text:list-style style:name="Заголовок_20_раздела-title" style:display-name="Заголовок раздел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Два_20_объекта-background" style:display-name="Два объекта-background" style:family="presentation">
      <style:graphic-properties draw:stroke="none" draw:fill="gradient" draw:fill-gradient-name="msFillGradient_20_6" draw:opacity-name="msTransGradient_20_6"/>
      <style:text-properties style:letter-kerning="true"/>
    </style:style>
    <style:style style:name="Два_20_объекта-backgroundobjects" style:display-name="Два объекта-backgroundobjects" style:family="presentation">
      <style:graphic-properties draw:textarea-horizontal-align="justify" draw:shadow="hidden" draw:shadow-offset-x="0.2cm" draw:shadow-offset-y="0.2cm" draw:shadow-color="#808080"/>
      <style:text-properties style:letter-kerning="true"/>
    </style:style>
    <style:style style:name="Два_20_объекта-notes" style:display-name="Два 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Два_20_объекта-outline1" style:display-name="Два объекта-outline1" style:family="presentation">
      <style:graphic-properties draw:stroke="none" draw:fill="none" draw:auto-grow-height="false" draw:fit-to-size="false" style:shrink-to-fit="true" style:writing-mode="lr-tb">
        <text:list-style style:name="Два_20_объекта-outline1" style:display-name="Два объект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Два_20_объекта-outline2" style:display-name="Два объекта-outline2" style:family="presentation" style:parent-style-name="Два_20_объекта-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Два_20_объекта-outline3" style:display-name="Два объекта-outline3" style:family="presentation" style:parent-style-name="Два_20_объекта-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Два_20_объекта-outline4" style:display-name="Два объекта-outline4" style:family="presentation" style:parent-style-name="Два_20_объекта-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Два_20_объекта-outline5" style:display-name="Два объекта-outline5" style:family="presentation" style:parent-style-name="Два_20_объекта-outline4">
      <style:paragraph-properties fo:margin-top="0.1cm" fo:margin-bottom="0cm"/>
      <style:text-properties fo:font-size="20pt" style:font-size-asian="20pt" style:font-size-complex="20pt"/>
    </style:style>
    <style:style style:name="Два_20_объекта-outline6" style:display-name="Два объекта-outline6" style:family="presentation" style:parent-style-name="Два_20_объекта-outline5">
      <style:paragraph-properties fo:margin-top="0.1cm" fo:margin-bottom="0cm"/>
      <style:text-properties fo:font-size="20pt" style:font-size-asian="20pt" style:font-size-complex="20pt"/>
    </style:style>
    <style:style style:name="Два_20_объекта-outline7" style:display-name="Два объекта-outline7" style:family="presentation" style:parent-style-name="Два_20_объекта-outline6">
      <style:paragraph-properties fo:margin-top="0.1cm" fo:margin-bottom="0cm"/>
      <style:text-properties fo:font-size="20pt" style:font-size-asian="20pt" style:font-size-complex="20pt"/>
    </style:style>
    <style:style style:name="Два_20_объекта-outline8" style:display-name="Два объекта-outline8" style:family="presentation" style:parent-style-name="Два_20_объекта-outline7">
      <style:paragraph-properties fo:margin-top="0.1cm" fo:margin-bottom="0cm"/>
      <style:text-properties fo:font-size="20pt" style:font-size-asian="20pt" style:font-size-complex="20pt"/>
    </style:style>
    <style:style style:name="Два_20_объекта-outline9" style:display-name="Два объекта-outline9" style:family="presentation" style:parent-style-name="Два_20_объекта-outline8">
      <style:paragraph-properties fo:margin-top="0.1cm" fo:margin-bottom="0cm"/>
      <style:text-properties fo:font-size="20pt" style:font-size-asian="20pt" style:font-size-complex="20pt"/>
    </style:style>
    <style:style style:name="Два_20_объекта-subtitle" style:display-name="Два объекта-subtitle" style:family="presentation">
      <style:graphic-properties draw:stroke="none" draw:fill="none" draw:textarea-vertical-align="middle">
        <text:list-style style:name="Два_20_объекта-subtitle" style:display-name="Два объект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Два_20_объекта-title" style:display-name="Два объекта-title" style:family="presentation">
      <style:graphic-properties draw:stroke="none" draw:fill="none" draw:textarea-vertical-align="middle" style:writing-mode="lr-tb">
        <text:list-style style:name="Два_20_объекта-title" style:display-name="Два объект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Сравнение-background" style:family="presentation">
      <style:graphic-properties draw:stroke="none" draw:fill="gradient" draw:fill-gradient-name="msFillGradient_20_7" draw:opacity-name="msTransGradient_20_7"/>
      <style:text-properties style:letter-kerning="true"/>
    </style:style>
    <style:style style:name="Сравнение-backgroundobjects" style:family="presentation">
      <style:graphic-properties draw:textarea-horizontal-align="justify" draw:shadow="hidden" draw:shadow-offset-x="0.2cm" draw:shadow-offset-y="0.2cm" draw:shadow-color="#808080"/>
      <style:text-properties style:letter-kerning="true"/>
    </style:style>
    <style:style style:name="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Сравнение-outline1" style:family="presentation">
      <style:graphic-properties draw:stroke="none" draw:fill="none" draw:auto-grow-height="false" draw:fit-to-size="false" style:shrink-to-fit="true" style:writing-mode="lr-tb">
        <text:list-style style:name="Сравнение-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Сравнение-outline2" style:family="presentation" style:parent-style-name="Сравнение-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Сравнение-outline3" style:family="presentation" style:parent-style-name="Сравнение-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Сравнение-outline4" style:family="presentation" style:parent-style-name="Сравнение-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Сравнение-outline5" style:family="presentation" style:parent-style-name="Сравнение-outline4">
      <style:paragraph-properties fo:margin-top="0.1cm" fo:margin-bottom="0cm"/>
      <style:text-properties fo:font-size="20pt" style:font-size-asian="20pt" style:font-size-complex="20pt"/>
    </style:style>
    <style:style style:name="Сравнение-outline6" style:family="presentation" style:parent-style-name="Сравнение-outline5">
      <style:paragraph-properties fo:margin-top="0.1cm" fo:margin-bottom="0cm"/>
      <style:text-properties fo:font-size="20pt" style:font-size-asian="20pt" style:font-size-complex="20pt"/>
    </style:style>
    <style:style style:name="Сравнение-outline7" style:family="presentation" style:parent-style-name="Сравнение-outline6">
      <style:paragraph-properties fo:margin-top="0.1cm" fo:margin-bottom="0cm"/>
      <style:text-properties fo:font-size="20pt" style:font-size-asian="20pt" style:font-size-complex="20pt"/>
    </style:style>
    <style:style style:name="Сравнение-outline8" style:family="presentation" style:parent-style-name="Сравнение-outline7">
      <style:paragraph-properties fo:margin-top="0.1cm" fo:margin-bottom="0cm"/>
      <style:text-properties fo:font-size="20pt" style:font-size-asian="20pt" style:font-size-complex="20pt"/>
    </style:style>
    <style:style style:name="Сравнение-outline9" style:family="presentation" style:parent-style-name="Сравнение-outline8">
      <style:paragraph-properties fo:margin-top="0.1cm" fo:margin-bottom="0cm"/>
      <style:text-properties fo:font-size="20pt" style:font-size-asian="20pt" style:font-size-complex="20pt"/>
    </style:style>
    <style:style style:name="Сравнение-subtitle" style:family="presentation">
      <style:graphic-properties draw:stroke="none" draw:fill="none" draw:textarea-vertical-align="middle">
        <text:list-style style:name="Сравнение-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Сравнение-title" style:family="presentation">
      <style:graphic-properties draw:stroke="none" draw:fill="none" draw:textarea-vertical-align="middle" style:writing-mode="lr-tb">
        <text:list-style style:name="Сравнение-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олько_20_заголовок-background" style:display-name="Только заголовок-background" style:family="presentation">
      <style:graphic-properties draw:stroke="none" draw:fill="gradient" draw:fill-gradient-name="msFillGradient_20_8" draw:opacity-name="msTransGradient_20_8"/>
      <style:text-properties style:letter-kerning="true"/>
    </style:style>
    <style:style style:name="Только_20_заголовок-backgroundobjects" style:display-name="Только заголовок-backgroundobjects" style:family="presentation">
      <style:graphic-properties draw:textarea-horizontal-align="justify" draw:shadow="hidden" draw:shadow-offset-x="0.2cm" draw:shadow-offset-y="0.2cm" draw:shadow-color="#808080"/>
      <style:text-properties style:letter-kerning="true"/>
    </style:style>
    <style:style style:name="Только_20_заголовок-notes" style:display-name="Только 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олько_20_заголовок-outline1" style:display-name="Только заголовок-outline1" style:family="presentation">
      <style:graphic-properties draw:stroke="none" draw:fill="none" draw:auto-grow-height="false" draw:fit-to-size="false" style:shrink-to-fit="true" style:writing-mode="lr-tb">
        <text:list-style style:name="Только_20_заголовок-outline1" style:display-name="Только заголовок-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олько_20_заголовок-outline2" style:display-name="Только заголовок-outline2" style:family="presentation" style:parent-style-name="Только_20_заголовок-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Только_20_заголовок-outline3" style:display-name="Только заголовок-outline3" style:family="presentation" style:parent-style-name="Только_20_заголовок-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олько_20_заголовок-outline4" style:display-name="Только заголовок-outline4" style:family="presentation" style:parent-style-name="Только_20_заголовок-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олько_20_заголовок-outline5" style:display-name="Только заголовок-outline5" style:family="presentation" style:parent-style-name="Только_20_заголовок-outline4">
      <style:paragraph-properties fo:margin-top="0.1cm" fo:margin-bottom="0cm"/>
      <style:text-properties fo:font-size="20pt" style:font-size-asian="20pt" style:font-size-complex="20pt"/>
    </style:style>
    <style:style style:name="Только_20_заголовок-outline6" style:display-name="Только заголовок-outline6" style:family="presentation" style:parent-style-name="Только_20_заголовок-outline5">
      <style:paragraph-properties fo:margin-top="0.1cm" fo:margin-bottom="0cm"/>
      <style:text-properties fo:font-size="20pt" style:font-size-asian="20pt" style:font-size-complex="20pt"/>
    </style:style>
    <style:style style:name="Только_20_заголовок-outline7" style:display-name="Только заголовок-outline7" style:family="presentation" style:parent-style-name="Только_20_заголовок-outline6">
      <style:paragraph-properties fo:margin-top="0.1cm" fo:margin-bottom="0cm"/>
      <style:text-properties fo:font-size="20pt" style:font-size-asian="20pt" style:font-size-complex="20pt"/>
    </style:style>
    <style:style style:name="Только_20_заголовок-outline8" style:display-name="Только заголовок-outline8" style:family="presentation" style:parent-style-name="Только_20_заголовок-outline7">
      <style:paragraph-properties fo:margin-top="0.1cm" fo:margin-bottom="0cm"/>
      <style:text-properties fo:font-size="20pt" style:font-size-asian="20pt" style:font-size-complex="20pt"/>
    </style:style>
    <style:style style:name="Только_20_заголовок-outline9" style:display-name="Только заголовок-outline9" style:family="presentation" style:parent-style-name="Только_20_заголовок-outline8">
      <style:paragraph-properties fo:margin-top="0.1cm" fo:margin-bottom="0cm"/>
      <style:text-properties fo:font-size="20pt" style:font-size-asian="20pt" style:font-size-complex="20pt"/>
    </style:style>
    <style:style style:name="Только_20_заголовок-subtitle" style:display-name="Только заголовок-subtitle" style:family="presentation">
      <style:graphic-properties draw:stroke="none" draw:fill="none" draw:textarea-vertical-align="middle">
        <text:list-style style:name="Только_20_заголовок-subtitle" style:display-name="Только заголовок-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олько_20_заголовок-title" style:display-name="Только заголовок-title" style:family="presentation">
      <style:graphic-properties draw:stroke="none" draw:fill="none" draw:textarea-vertical-align="middle" style:writing-mode="lr-tb">
        <text:list-style style:name="Только_20_заголовок-title" style:display-name="Только заголовок-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Пустой_20_слайд-background" style:display-name="Пустой слайд-background" style:family="presentation">
      <style:graphic-properties draw:stroke="none" draw:fill="gradient" draw:fill-gradient-name="msFillGradient_20_9" draw:opacity-name="msTransGradient_20_9"/>
      <style:text-properties style:letter-kerning="true"/>
    </style:style>
    <style:style style:name="Пустой_20_слайд-backgroundobjects" style:display-name="Пустой слайд-backgroundobjects" style:family="presentation">
      <style:graphic-properties draw:textarea-horizontal-align="justify" draw:shadow="hidden" draw:shadow-offset-x="0.2cm" draw:shadow-offset-y="0.2cm" draw:shadow-color="#808080"/>
      <style:text-properties style:letter-kerning="true"/>
    </style:style>
    <style:style style:name="Пустой_20_слайд-notes" style:display-name="Пустой 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Пустой_20_слайд-outline1" style:display-name="Пустой слайд-outline1" style:family="presentation">
      <style:graphic-properties draw:stroke="none" draw:fill="none" draw:auto-grow-height="false" draw:fit-to-size="false" style:shrink-to-fit="true" style:writing-mode="lr-tb">
        <text:list-style style:name="Пустой_20_слайд-outline1" style:display-name="Пусто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Пустой_20_слайд-outline2" style:display-name="Пустой слайд-outline2" style:family="presentation" style:parent-style-name="Пустой_20_слайд-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Пустой_20_слайд-outline3" style:display-name="Пустой слайд-outline3" style:family="presentation" style:parent-style-name="Пустой_20_слайд-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Пустой_20_слайд-outline4" style:display-name="Пустой слайд-outline4" style:family="presentation" style:parent-style-name="Пустой_20_слайд-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Пустой_20_слайд-outline5" style:display-name="Пустой слайд-outline5" style:family="presentation" style:parent-style-name="Пустой_20_слайд-outline4">
      <style:paragraph-properties fo:margin-top="0.1cm" fo:margin-bottom="0cm"/>
      <style:text-properties fo:font-size="20pt" style:font-size-asian="20pt" style:font-size-complex="20pt"/>
    </style:style>
    <style:style style:name="Пустой_20_слайд-outline6" style:display-name="Пустой слайд-outline6" style:family="presentation" style:parent-style-name="Пустой_20_слайд-outline5">
      <style:paragraph-properties fo:margin-top="0.1cm" fo:margin-bottom="0cm"/>
      <style:text-properties fo:font-size="20pt" style:font-size-asian="20pt" style:font-size-complex="20pt"/>
    </style:style>
    <style:style style:name="Пустой_20_слайд-outline7" style:display-name="Пустой слайд-outline7" style:family="presentation" style:parent-style-name="Пустой_20_слайд-outline6">
      <style:paragraph-properties fo:margin-top="0.1cm" fo:margin-bottom="0cm"/>
      <style:text-properties fo:font-size="20pt" style:font-size-asian="20pt" style:font-size-complex="20pt"/>
    </style:style>
    <style:style style:name="Пустой_20_слайд-outline8" style:display-name="Пустой слайд-outline8" style:family="presentation" style:parent-style-name="Пустой_20_слайд-outline7">
      <style:paragraph-properties fo:margin-top="0.1cm" fo:margin-bottom="0cm"/>
      <style:text-properties fo:font-size="20pt" style:font-size-asian="20pt" style:font-size-complex="20pt"/>
    </style:style>
    <style:style style:name="Пустой_20_слайд-outline9" style:display-name="Пустой слайд-outline9" style:family="presentation" style:parent-style-name="Пустой_20_слайд-outline8">
      <style:paragraph-properties fo:margin-top="0.1cm" fo:margin-bottom="0cm"/>
      <style:text-properties fo:font-size="20pt" style:font-size-asian="20pt" style:font-size-complex="20pt"/>
    </style:style>
    <style:style style:name="Пустой_20_слайд-subtitle" style:display-name="Пустой слайд-subtitle" style:family="presentation">
      <style:graphic-properties draw:stroke="none" draw:fill="none" draw:textarea-vertical-align="middle">
        <text:list-style style:name="Пустой_20_слайд-subtitle" style:display-name="Пусто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устой_20_слайд-title" style:display-name="Пустой слайд-title" style:family="presentation">
      <style:graphic-properties draw:stroke="none" draw:fill="none" draw:textarea-vertical-align="middle" style:writing-mode="lr-tb">
        <text:list-style style:name="Пустой_20_слайд-title" style:display-name="Пусто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Объект_20_с_20_подписью-background" style:display-name="Объект с подписью-background" style:family="presentation">
      <style:graphic-properties draw:stroke="none" draw:fill="gradient" draw:fill-gradient-name="msFillGradient_20_10" draw:opacity-name="msTransGradient_20_10"/>
      <style:text-properties style:letter-kerning="true"/>
    </style:style>
    <style:style style:name="Объект_20_с_20_подписью-backgroundobjects" style:display-name="Объект с подписью-backgroundobjects" style:family="presentation">
      <style:graphic-properties draw:textarea-horizontal-align="justify" draw:shadow="hidden" draw:shadow-offset-x="0.2cm" draw:shadow-offset-y="0.2cm" draw:shadow-color="#808080"/>
      <style:text-properties style:letter-kerning="true"/>
    </style:style>
    <style:style style:name="Объект_20_с_20_подписью-notes" style:display-name="Объект с 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ъект_20_с_20_подписью-outline1" style:display-name="Объект с подписью-outline1" style:family="presentation">
      <style:graphic-properties draw:stroke="none" draw:fill="none" draw:auto-grow-height="false" draw:fit-to-size="false" style:shrink-to-fit="true" style:writing-mode="lr-tb">
        <text:list-style style:name="Объект_20_с_20_подписью-outline1" style:display-name="Объект с подписью-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Объект_20_с_20_подписью-outline2" style:display-name="Объект с подписью-outline2" style:family="presentation" style:parent-style-name="Объект_20_с_20_подписью-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Объект_20_с_20_подписью-outline3" style:display-name="Объект с подписью-outline3" style:family="presentation" style:parent-style-name="Объект_20_с_20_подписью-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Объект_20_с_20_подписью-outline4" style:display-name="Объект с подписью-outline4" style:family="presentation" style:parent-style-name="Объект_20_с_20_подписью-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Объект_20_с_20_подписью-outline5" style:display-name="Объект с подписью-outline5" style:family="presentation" style:parent-style-name="Объект_20_с_20_подписью-outline4">
      <style:paragraph-properties fo:margin-top="0.1cm" fo:margin-bottom="0cm"/>
      <style:text-properties fo:font-size="20pt" style:font-size-asian="20pt" style:font-size-complex="20pt"/>
    </style:style>
    <style:style style:name="Объект_20_с_20_подписью-outline6" style:display-name="Объект с подписью-outline6" style:family="presentation" style:parent-style-name="Объект_20_с_20_подписью-outline5">
      <style:paragraph-properties fo:margin-top="0.1cm" fo:margin-bottom="0cm"/>
      <style:text-properties fo:font-size="20pt" style:font-size-asian="20pt" style:font-size-complex="20pt"/>
    </style:style>
    <style:style style:name="Объект_20_с_20_подписью-outline7" style:display-name="Объект с подписью-outline7" style:family="presentation" style:parent-style-name="Объект_20_с_20_подписью-outline6">
      <style:paragraph-properties fo:margin-top="0.1cm" fo:margin-bottom="0cm"/>
      <style:text-properties fo:font-size="20pt" style:font-size-asian="20pt" style:font-size-complex="20pt"/>
    </style:style>
    <style:style style:name="Объект_20_с_20_подписью-outline8" style:display-name="Объект с подписью-outline8" style:family="presentation" style:parent-style-name="Объект_20_с_20_подписью-outline7">
      <style:paragraph-properties fo:margin-top="0.1cm" fo:margin-bottom="0cm"/>
      <style:text-properties fo:font-size="20pt" style:font-size-asian="20pt" style:font-size-complex="20pt"/>
    </style:style>
    <style:style style:name="Объект_20_с_20_подписью-outline9" style:display-name="Объект с подписью-outline9" style:family="presentation" style:parent-style-name="Объект_20_с_20_подписью-outline8">
      <style:paragraph-properties fo:margin-top="0.1cm" fo:margin-bottom="0cm"/>
      <style:text-properties fo:font-size="20pt" style:font-size-asian="20pt" style:font-size-complex="20pt"/>
    </style:style>
    <style:style style:name="Объект_20_с_20_подписью-subtitle" style:display-name="Объект с подписью-subtitle" style:family="presentation">
      <style:graphic-properties draw:stroke="none" draw:fill="none" draw:textarea-vertical-align="middle">
        <text:list-style style:name="Объект_20_с_20_подписью-subtitle" style:display-name="Объект с подписью-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ъект_20_с_20_подписью-title" style:display-name="Объект с подписью-title" style:family="presentation">
      <style:graphic-properties draw:stroke="none" draw:fill="none" draw:textarea-vertical-align="middle" style:writing-mode="lr-tb">
        <text:list-style style:name="Объект_20_с_20_подписью-title" style:display-name="Объект с подписью-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Рисунок_20_с_20_подписью-background" style:display-name="Рисунок с подписью-background" style:family="presentation">
      <style:graphic-properties draw:stroke="none" draw:fill="gradient" draw:fill-gradient-name="msFillGradient_20_11" draw:opacity-name="msTransGradient_20_11"/>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false" style:shrink-to-fit="true" style:writing-mode="lr-tb">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Рисунок_20_с_20_подписью-outline2" style:display-name="Рисунок с подписью-outline2" style:family="presentation" style:parent-style-name="Рисунок_20_с_20_подписью-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Рисунок_20_с_20_подписью-outline3" style:display-name="Рисунок с подписью-outline3" style:family="presentation" style:parent-style-name="Рисунок_20_с_20_подписью-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Рисунок_20_с_20_подписью-outline4" style:display-name="Рисунок с подписью-outline4" style:family="presentation" style:parent-style-name="Рисунок_20_с_20_подписью-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Рисунок_20_с_20_подписью-outline5" style:display-name="Рисунок с подписью-outline5" style:family="presentation" style:parent-style-name="Рисунок_20_с_20_подписью-outline4">
      <style:paragraph-properties fo:margin-top="0.1cm" fo:margin-bottom="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top="0.1cm" fo:margin-bottom="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top="0.1cm" fo:margin-bottom="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top="0.1cm" fo:margin-bottom="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top="0.1cm" fo:margin-bottom="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style:writing-mode="lr-tb">
        <text:list-style style:name="Рисунок_20_с_20_подписью-title" style:display-name="Рисунок с подписью-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draw:opacity-name="msTransGradient_20_1"/>
    </style:style>
    <style:style style:name="Mdp2" style:family="drawing-page">
      <style:drawing-page-properties draw:background-size="border" draw:fill="gradient" draw:fill-gradient-name="msFillGradient_20_2" draw:opacity-name="msTransGradient_20_2"/>
    </style:style>
    <style:style style:name="Mdp3" style:family="drawing-page">
      <style:drawing-page-properties draw:background-size="border" draw:fill="gradient" draw:fill-gradient-name="msFillGradient_20_3" draw:opacity-name="msTransGradient_20_3"/>
    </style:style>
    <style:style style:name="Mdp4" style:family="drawing-page">
      <style:drawing-page-properties draw:background-size="border" draw:fill="gradient" draw:fill-gradient-name="msFillGradient_20_4" draw:opacity-name="msTransGradient_20_4"/>
    </style:style>
    <style:style style:name="Mdp5" style:family="drawing-page">
      <style:drawing-page-properties draw:background-size="border" draw:fill="gradient" draw:fill-gradient-name="msFillGradient_20_5" draw:opacity-name="msTransGradient_20_5"/>
    </style:style>
    <style:style style:name="Mdp6" style:family="drawing-page">
      <style:drawing-page-properties draw:background-size="border" draw:fill="gradient" draw:fill-gradient-name="msFillGradient_20_6" draw:opacity-name="msTransGradient_20_6"/>
    </style:style>
    <style:style style:name="Mdp7" style:family="drawing-page">
      <style:drawing-page-properties draw:background-size="border" draw:fill="gradient" draw:fill-gradient-name="msFillGradient_20_7" draw:opacity-name="msTransGradient_20_7"/>
    </style:style>
    <style:style style:name="Mdp8" style:family="drawing-page">
      <style:drawing-page-properties draw:background-size="border" draw:fill="gradient" draw:fill-gradient-name="msFillGradient_20_8" draw:opacity-name="msTransGradient_20_8"/>
    </style:style>
    <style:style style:name="Mdp9" style:family="drawing-page">
      <style:drawing-page-properties draw:background-size="border" draw:fill="gradient" draw:fill-gradient-name="msFillGradient_20_9" draw:opacity-name="msTransGradient_20_9"/>
    </style:style>
    <style:style style:name="Mdp10" style:family="drawing-page">
      <style:drawing-page-properties draw:background-size="border" draw:fill="gradient" draw:fill-gradient-name="msFillGradient_20_10" draw:opacity-name="msTransGradient_20_10"/>
    </style:style>
    <style:style style:name="Mdp11" style:family="drawing-page">
      <style:drawing-page-properties draw:background-size="border" draw:fill="gradient" draw:fill-gradient-name="msFillGradient_20_11" draw:opacity-name="msTransGradient_20_11"/>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Титульный_20_слайд-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Титульный_20_слайд-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Титульный_20_слайд-backgroundobjects">
      <style:graphic-properties draw:stroke="none" draw:fill="none" draw:fill-color="#ffffff" draw:auto-grow-height="false" fo:min-height="1.485cm" loext:decorative="false"/>
      <style:paragraph-properties style:writing-mode="lr-tb"/>
    </style:style>
    <style:style style:name="Mpr4" style:family="presentation" style:parent-style-name="Титульны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Заголовок_20_и_20_вертикальный_20_текс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Заголовок_20_и_20_вертикальный_20_текст-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Заголовок_20_и_20_вертикальный_20_текс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Заголовок_20_и_20_вертикальный_20_текст-backgroundobjects">
      <style:graphic-properties draw:stroke="none" draw:fill="none" draw:fill-color="#ffffff" draw:auto-grow-height="false" fo:min-height="1.485cm" loext:decorative="false"/>
      <style:paragraph-properties style:writing-mode="lr-tb"/>
    </style:style>
    <style:style style:name="Mpr9" style:family="presentation" style:parent-style-name="Заголовок_20_и_20_вертикальный_20_текст-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Вертикальный_20_заголовок_20_и_20_текст-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Вертикальный_20_заголовок_20_и_20_текст-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Вертикальный_20_заголовок_20_и_20_текс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Вертикальный_20_заголовок_20_и_20_текст-backgroundobjects">
      <style:graphic-properties draw:stroke="none" draw:fill="none" draw:fill-color="#ffffff" draw:auto-grow-height="false" fo:min-height="1.485cm" loext:decorative="false"/>
      <style:paragraph-properties style:writing-mode="lr-tb"/>
    </style:style>
    <style:style style:name="Mpr14" style:family="presentation" style:parent-style-name="Вертикальный_20_заголовок_20_и_20_текст-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Заголовок_20_и_20_объек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Заголовок_20_и_20_объект-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Заголовок_20_и_20_объек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Заголовок_20_и_20_объект-backgroundobjects">
      <style:graphic-properties draw:stroke="none" draw:fill="none" draw:fill-color="#ffffff" draw:auto-grow-height="false" fo:min-height="1.485cm" loext:decorative="false"/>
      <style:paragraph-properties style:writing-mode="lr-tb"/>
    </style:style>
    <style:style style:name="Mpr19" style:family="presentation" style:parent-style-name="Заголовок_20_и_20_объект-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Заголовок_20_раздела-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Заголовок_20_раздела-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Заголовок_20_раздела-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Заголовок_20_раздела-backgroundobjects">
      <style:graphic-properties draw:stroke="none" draw:fill="none" draw:fill-color="#ffffff" draw:auto-grow-height="false" fo:min-height="1.485cm" loext:decorative="false"/>
      <style:paragraph-properties style:writing-mode="lr-tb"/>
    </style:style>
    <style:style style:name="Mpr24" style:family="presentation" style:parent-style-name="Заголовок_20_раздела-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Два_20_объекта-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Два_20_объекта-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Два_20_объекта-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Два_20_объекта-backgroundobjects">
      <style:graphic-properties draw:stroke="none" draw:fill="none" draw:fill-color="#ffffff" draw:auto-grow-height="false" fo:min-height="1.485cm" loext:decorative="false"/>
      <style:paragraph-properties style:writing-mode="lr-tb"/>
    </style:style>
    <style:style style:name="Mpr29" style:family="presentation" style:parent-style-name="Два_20_объекта-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Сравнение-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Сравнение-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Сравнение-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Сравнение-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Сравнение-backgroundobjects">
      <style:graphic-properties draw:stroke="none" draw:fill="none" draw:fill-color="#ffffff" draw:auto-grow-height="false" fo:min-height="1.485cm" loext:decorative="false"/>
      <style:paragraph-properties style:writing-mode="lr-tb"/>
    </style:style>
    <style:style style:name="Mpr35" style:family="presentation" style:parent-style-name="Сравнение-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Только_20_заголовок-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Только_20_заголовок-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Только_20_заголовок-backgroundobjects">
      <style:graphic-properties draw:stroke="none" draw:fill="none" draw:fill-color="#ffffff" draw:auto-grow-height="false" fo:min-height="1.485cm" loext:decorative="false"/>
      <style:paragraph-properties style:writing-mode="lr-tb"/>
    </style:style>
    <style:style style:name="Mpr39" style:family="presentation" style:parent-style-name="Только_20_заголовок-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Пустой_20_слайд-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Пустой_20_слайд-backgroundobjects">
      <style:graphic-properties draw:stroke="none" draw:fill="none" draw:fill-color="#ffffff" draw:auto-grow-height="false" fo:min-height="1.485cm" loext:decorative="false"/>
      <style:paragraph-properties style:writing-mode="lr-tb"/>
    </style:style>
    <style:style style:name="Mpr42" style:family="presentation" style:parent-style-name="Пусто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Объект_20_с_20_подписью-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Объект_20_с_20_подписью-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Объект_20_с_20_подписью-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Объект_20_с_20_подписью-backgroundobjects">
      <style:graphic-properties draw:stroke="none" draw:fill="none" draw:fill-color="#ffffff" draw:auto-grow-height="false" fo:min-height="1.485cm" loext:decorative="false"/>
      <style:paragraph-properties style:writing-mode="lr-tb"/>
    </style:style>
    <style:style style:name="Mpr47" style:family="presentation" style:parent-style-name="Объект_20_с_20_подписью-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Рисунок_20_с_20_подписью-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Рисунок_20_с_20_подписью-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Рисунок_20_с_20_подписью-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Рисунок_20_с_20_подписью-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Рисунок_20_с_20_подписью-backgroundobjects">
      <style:graphic-properties draw:stroke="none" draw:fill="none" draw:fill-color="#ffffff" draw:auto-grow-height="false" fo:min-height="1.485cm" loext:decorative="false"/>
      <style:paragraph-properties style:writing-mode="lr-tb"/>
    </style:style>
    <style:style style:name="Mpr53" style:family="presentation" style:parent-style-name="Рисунок_20_с_20_подписью-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P2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Титульный_20_слайд" style:display-name="Титульный слайд" style:page-layout-name="PM1" draw:style-name="Mdp1">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2">
        <draw:page-thumbnail presentation:style-name="Титульный_20_слайд-title" draw:layer="backgroundobjects" svg:width="19.798cm" svg:height="11.136cm" svg:x="0.6cm" svg:y="2.257cm" presentation:class="page"/>
        <draw:frame presentation:style-name="Титульный_20_слайд-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Заголовок_20_и_20_вертикальный_20_текст" style:display-name="Заголовок и вертикальный текст" style:page-layout-name="PM1" draw:style-name="Mdp2">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2">
        <draw:page-thumbnail presentation:style-name="Заголовок_20_и_20_вертикальный_20_текст-title" draw:layer="backgroundobjects" svg:width="0.001cm" svg:height="0.001cm" svg:x="0cm" svg:y="2.257cm" presentation:class="page"/>
        <draw:frame presentation:style-name="Заголовок_20_и_20_вертикальный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Вертикальный_20_заголовок_20_и_20_текст" style:display-name="Вертикальный заголовок и текст" style:page-layout-name="PM1" draw:style-name="Mdp3">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Vertical Title 1" presentation:style-name="Mpr10" draw:text-style-name="MP12" draw:layer="backgroundobjects" svg:width="7.302cm" svg:height="16.143cm" svg:x="24.236cm" svg:y="1.014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2">
        <draw:page-thumbnail presentation:style-name="Вертикальный_20_заголовок_20_и_20_текст-title" draw:layer="backgroundobjects" svg:width="0.001cm" svg:height="0.001cm" svg:x="0cm" svg:y="2.257cm" presentation:class="page"/>
        <draw:frame presentation:style-name="Вертикальный_20_заголовок_20_и_20_текст-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Заголовок_20_и_20_объект" style:display-name="Заголовок и объект" style:page-layout-name="PM1" draw:style-name="Mdp4">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2">
        <draw:page-thumbnail presentation:style-name="Заголовок_20_и_20_объект-title" draw:layer="backgroundobjects" svg:width="0.001cm" svg:height="0.001cm" svg:x="0cm" svg:y="2.257cm" presentation:class="page"/>
        <draw:frame presentation:style-name="Заголовок_20_и_20_объект-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Заголовок_20_раздела" style:display-name="Заголовок раздела" style:page-layout-name="PM1" draw:style-name="Mdp5">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9.209cm" svg:height="7.923cm" svg:x="2.311cm" svg:y="4.749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2">
        <draw:page-thumbnail presentation:style-name="Заголовок_20_раздела-title" draw:layer="backgroundobjects" svg:width="0.001cm" svg:height="0.001cm" svg:x="0cm" svg:y="2.257cm" presentation:class="page"/>
        <draw:frame presentation:style-name="Заголовок_20_раздела-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Два_20_объекта" style:display-name="Два объекта" style:page-layout-name="PM1" draw:style-name="Mdp6">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2">
        <draw:page-thumbnail presentation:style-name="Два_20_объекта-title" draw:layer="backgroundobjects" svg:width="0.001cm" svg:height="0.001cm" svg:x="0cm" svg:y="2.257cm" presentation:class="page"/>
        <draw:frame presentation:style-name="Два_20_объекта-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Сравнение" style:page-layout-name="PM1" draw:style-name="Mdp7">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0" draw:text-style-name="MP12" draw:layer="backgroundobjects" svg:width="29.209cm" svg:height="3.681cm" svg:x="2.333cm" svg:y="1.014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Click to edit Master text styles</text:span></text:p>
            </text:list-item>
          </text:list>
        </draw:text-box>
      </draw:frame>
      <draw:frame draw:name="Content Placeholder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4.397cm" svg:height="2.288cm" svg:x="17.145cm" svg:y="4.67cm" presentation:class="outline" presentation:user-transformed="true">
        <draw:text-box>
          <text:p text:style-name="MP16"><text:span text:style-name="MT10">Click to edit Master text styles</text:span></text:p>
        </draw:text-box>
      </draw:frame>
      <draw:frame draw:name="Content Placeholder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2">
        <draw:page-thumbnail presentation:style-name="Сравнение-title" draw:layer="backgroundobjects" svg:width="0.001cm" svg:height="0.001cm" svg:x="0cm" svg:y="2.257cm" presentation:class="page"/>
        <draw:frame presentation:style-name="Сравнение-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Только_20_заголовок" style:display-name="Только заголовок" style:page-layout-name="PM1" draw:style-name="Mdp8">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6"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2">
        <draw:page-thumbnail presentation:style-name="Только_20_заголовок-title" draw:layer="backgroundobjects" svg:width="0.001cm" svg:height="0.001cm" svg:x="0cm" svg:y="2.257cm" presentation:class="page"/>
        <draw:frame presentation:style-name="Только_20_заголовок-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Пустой_20_слайд" style:display-name="Пустой слайд" style:page-layout-name="PM1" draw:style-name="Mdp9">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draw:frame presentation:style-name="Пустой_20_слайд-title" draw:layer="backgroundobjects" svg:width="30.479cm" svg:height="3.18cm" svg:x="1.693cm" svg:y="0.76cm" presentation:class="title" presentation:placeholder="true">
        <draw:text-box/>
      </draw:frame>
      <draw:frame presentation:style-name="Пустой_20_слайд-outline1" draw:layer="backgroundobjects" svg:width="30.479cm" svg:height="11.048cm" svg:x="1.693cm" svg:y="4.457cm" presentation:class="outline" presentation:placeholder="true">
        <draw:text-box/>
      </draw:frame>
      <presentation:notes style:page-layout-name="PM2">
        <draw:page-thumbnail presentation:style-name="Пустой_20_слайд-title" draw:layer="backgroundobjects" svg:width="0.001cm" svg:height="0.001cm" svg:x="0cm" svg:y="2.257cm" presentation:class="page"/>
        <draw:frame presentation:style-name="Пустой_20_слайд-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Объект_20_с_20_подписью" style:display-name="Объект с подписью" style:page-layout-name="PM1" draw:style-name="Mdp10">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3"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Click to edit Master text 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2">
        <draw:page-thumbnail presentation:style-name="Объект_20_с_20_подписью-title" draw:layer="backgroundobjects" svg:width="0.001cm" svg:height="0.001cm" svg:x="0cm" svg:y="2.257cm" presentation:class="page"/>
        <draw:frame presentation:style-name="Объект_20_с_20_подписью-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Рисунок_20_с_20_подписью" style:display-name="Рисунок с подписью" style:page-layout-name="PM1" draw:style-name="Mdp11">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8"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Picture Placeholder 2" presentation:style-name="Mpr49" draw:text-style-name="MP18" draw:layer="backgroundobjects" svg:width="17.144cm" svg:height="13.537cm" svg:x="14.398cm" svg:y="2.743cm" presentation:class="outline" presentation:user-transformed="true">
        <draw:text-box>
          <text:list text:style-name="ML3">
            <text:list-item>
              <text:p text:style-name="MP20"><text:span text:style-name="MT12">Click icon to add picture</text:span></text:p>
            </text:list-item>
          </text:list>
        </draw:text-box>
      </draw:frame>
      <draw:frame draw:name="Text Placeholder 3" presentation:style-name="Mpr50"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51"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51"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51"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2">
        <draw:page-thumbnail presentation:style-name="Рисунок_20_с_20_подписью-title" draw:layer="backgroundobjects" svg:width="0.001cm" svg:height="0.001cm" svg:x="0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Alexandra Ragazhinskaya</meta:initial-creator>
    <dc:creator>redAndBlackDev</dc:creator>
    <meta:editing-cycles>28</meta:editing-cycles>
    <meta:print-date>2020-08-31T22:23:58</meta:print-date>
    <meta:creation-date>2021-07-07T23:54:57</meta:creation-date>
    <dc:date>2026-06-30T17:00:47.373725248</dc:date>
    <meta:editing-duration>P1DT2H6M57S</meta:editing-duration>
    <meta:generator>LibreOffice/24.2.7.2$Linux_X86_64 LibreOffice_project/420$Build-2</meta:generator>
    <meta:document-statistic meta:object-count="155"/>
    <meta:user-defined meta:name="AppVersion">16.0000</meta:user-defined>
    <meta:user-defined meta:name="Notes" meta:value-type="float">1</meta:user-defined>
    <meta:user-defined meta:name="PresentationFormat">Widescreen</meta:user-defined>
    <meta:user-defined meta:name="Slides" meta:value-type="float">3</meta:user-defined>
    <meta:template xlink:type="simple" xlink:actuate="onRequest" xlink:title="IC-IT-Project-Roadmap-Template_PowerPoint" xlink:href=""/>
  </office:meta>
</office:document-meta>
</file>